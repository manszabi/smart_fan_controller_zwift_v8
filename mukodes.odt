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>
    <style:style style:name="TabWide" style:family="table">
      <style:table-properties style:width="17cm" table:align="margins" fo:margin-top="0.2cm" fo:margin-bottom="0.3cm"/>
    </style:style>
    <style:style style:name="TabCell" style:family="table-cell">
      <style:table-cell-properties fo:border="0.5pt solid #808080" fo:padding="0.1cm"/>
    </style:style>
    <style:style style:name="TabHead" style:family="table-cell">
      <style:table-cell-properties fo:border="0.5pt solid #808080" fo:padding="0.1cm" fo:background-color="#dce6f1"/>
    </style:style>
    <text:list-style style:name="LBullet">
      <text:list-level-style-bullet text:level="1" text:bullet-char="•">
        <style:list-level-properties text:space-before="0.4cm" text:min-label-width="0.5cm"/>
      </text:list-level-style-bullet>
    </text:list-style>
    <text:list-style style:name="LNumber">
      <text:list-level-style-number text:level="1" style:num-suffix="." style:num-format="1">
        <style:list-level-properties text:space-before="0.4cm" text:min-label-width="0.6cm"/>
      </text:list-level-style-number>
    </text:list-style>
  </office:automatic-styles>
  <office:body>
    <office:text>
      <text:p text:style-name="Title">Smart Fan Controller – részletes működési leírás</text:p>
      <text:p text:style-name="Text_20_body"><text:span text:style-name="Italic">Verzió: 8.1.1  |  A leírás a program tényleges forráskódja alapján készült.</text:span></text:p>
      <text:h text:style-name="Heading_20_2" text:outline-level="2">1. Mi ez a program, és mit csinál?</text:h>
      <text:p text:style-name="Text_20_body">A Smart Fan Controller egy kerékpáros beltéri edzéshez készült okos ventilátor-vezérlő. A lényege egyszerű: minél keményebben tekersz, annál erősebben fújjon a ventilátor – és amikor megállsz, álljon le magától.</text:p>
      <text:p text:style-name="Text_20_body">Ehhez a program valós időben figyeli a teljesítményedet (watt) és/vagy a pulzusodat (bpm), ezekből kiszámolja, melyik „ventilátor-zónában” vagy éppen (0 = kikapcsolva, 1 = gyenge, 2 = közepes, 3 = maximum), és az eredményt Bluetooth-on (BLE) elküldi egy ESP32-alapú ventilátor-vezérlő doboznak <text:span text:style-name="Code">LEVEL:0</text:span> … <text:span text:style-name="Code">LEVEL:3</text:span> formájú parancsként. Az ESP32 ez alapján kapcsolgatja a reléket: 1. zóna = 1 ventilátor, 2. zóna = 2 ventilátor, 3. zóna = mindhárom.</text:p>
      <text:p text:style-name="Text_20_body">Az adatok háromféle forrásból jöhetnek, tetszőlegesen kombinálva:</text:p>
      <text:list text:style-name="LBullet">
        <text:list-item>
          <text:p text:style-name="Text_20_body"><text:span text:style-name="Bold">ANT+</text:span> – USB-s ANT+ vevővel (pl. Garmin stick) közvetlenül a wattmérőtől és a pulzusmérőtől,</text:p>
        </text:list-item>
        <text:list-item>
          <text:p text:style-name="Text_20_body"><text:span text:style-name="Bold">BLE</text:span> – Bluetooth-os wattmérőtől és pulzusmérőtől közvetlenül,</text:p>
        </text:list-item>
        <text:list-item>
          <text:p text:style-name="Text_20_body"><text:span text:style-name="Bold">Zwift API</text:span> – a Zwift szerveréről lekérdezve (ilyenkor egy segédprogram is fut a háttérben).</text:p>
        </text:list-item>
      </text:list>
      <text:p text:style-name="Text_20_body">Mindezt egy Star Trek LCARS stílusú, mindig felül lebegő kis ablak (HUD) mutatja, hangeffektekkel. A HUD nélkül, „vak” üzemmódban is működik a program (pl. Raspberry Pi-n, terminálból).</text:p>
      <text:h text:style-name="Heading_20_2" text:outline-level="2">2. A program felépítése – melyik rész miért felel?</text:h>
      <text:p text:style-name="Text_20_body">A kód egy Python-csomagban (<text:span text:style-name="Code">smart_fan_controller/</text:span>) van, feladatok szerint szétbontva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Rész</text:p>
          </table:table-cell>
          <table:table-cell table:style-name="TabHead" office:value-type="string">
            <text:p text:style-name="Table_20_Heading">Feladata</text:p>
          </table:table-cell>
        </table:table-row>
        <table:table-row>
          <table:table-cell table:style-name="TabCell" office:value-type="string">
            <text:p text:style-name="Table_20_Contents"><text:span text:style-name="Code">zwift_fan_controller.py</text:span></text:p>
          </table:table-cell>
          <table:table-cell table:style-name="TabCell" office:value-type="string">
            <text:p text:style-name="Table_20_Contents">A belépési pont – ezt indítod el. Maga szinte semmit nem csinál, csak meghívja az <text:span text:style-name="Code">app.main()</text:span>-t.</text:p>
          </table:table-cell>
        </table:table-row>
        <table:table-row>
          <table:table-cell table:style-name="TabCell" office:value-type="string">
            <text:p text:style-name="Table_20_Contents"><text:span text:style-name="Code">app.py</text:span></text:p>
          </table:table-cell>
          <table:table-cell table:style-name="TabCell" office:value-type="string">
            <text:p text:style-name="Table_20_Contents">Az „igazgató”: elindítja a naplózást, betölti a beállításokat, külön szálon elindítja a vezérlőt, a fő szálon pedig a HUD-ot. A leállítást is ő koordinálja.</text:p>
          </table:table-cell>
        </table:table-row>
        <table:table-row>
          <table:table-cell table:style-name="TabCell" office:value-type="string">
            <text:p text:style-name="Table_20_Contents"><text:span text:style-name="Code">controller.py</text:span></text:p>
          </table:table-cell>
          <table:table-cell table:style-name="TabCell" office:value-type="string">
            <text:p text:style-name="Table_20_Contents">A karmester (<text:span text:style-name="Code">FanController</text:span>): a beállítások alapján összerakja és elindítja az összes szükséges részegységet (adatforrások, feldolgozók, ventilátor-kimenet), és gondoskodik a tiszta leállásról.</text:p>
          </table:table-cell>
        </table:table-row>
        <table:table-row>
          <table:table-cell table:style-name="TabCell" office:value-type="string">
            <text:p text:style-name="Table_20_Contents"><text:span text:style-name="Code">config/</text:span></text:p>
          </table:table-cell>
          <table:table-cell table:style-name="TabCell" office:value-type="string">
            <text:p text:style-name="Table_20_Contents">A <text:span text:style-name="Code">settings.json</text:span> beolvasása és szigorú ellenőrzése. Minden hibás értékre figyelmeztet, és az alapértelmezettel megy tovább – a program soha nem áll le rossz beállítás miatt.</text:p>
          </table:table-cell>
        </table:table-row>
        <table:table-row>
          <table:table-cell table:style-name="TabCell" office:value-type="string">
            <text:p text:style-name="Table_20_Contents"><text:span text:style-name="Code">core/</text:span></text:p>
          </table:table-cell>
          <table:table-cell table:style-name="TabCell" office:value-type="string">
            <text:p text:style-name="Table_20_Contents">A „tiszta” logika: zónahatár-számítás, gördülő átlagolás, cooldown-időzítés, naplózás. Nem függ se a Bluetooth-tól, se a képernyőtől – ezért könnyen tesztelhető.</text:p>
          </table:table-cell>
        </table:table-row>
        <table:table-row>
          <table:table-cell table:style-name="TabCell" office:value-type="string">
            <text:p text:style-name="Table_20_Contents"><text:span text:style-name="Code">handlers/</text:span></text:p>
          </table:table-cell>
          <table:table-cell table:style-name="TabCell" office:value-type="string">
            <text:p text:style-name="Table_20_Contents">A külvilággal beszélő részek: ANT+ vevő (<text:span text:style-name="Code">_ant.py</text:span>), BLE szenzorok és a BLE ventilátor (<text:span text:style-name="Code">_ble.py</text:span>), Zwift UDP fogadó (<text:span text:style-name="Code">zwift_udp.py</text:span>).</text:p>
          </table:table-cell>
        </table:table-row>
        <table:table-row>
          <table:table-cell table:style-name="TabCell" office:value-type="string">
            <text:p text:style-name="Table_20_Contents"><text:span text:style-name="Code">processors/</text:span></text:p>
          </table:table-cell>
          <table:table-cell table:style-name="TabCell" office:value-type="string">
            <text:p text:style-name="Table_20_Contents">A futószalag: a nyers adatokból átlagot és zónát számol, alkalmazza a cooldownt, figyeli az adatkiesést.</text:p>
          </table:table-cell>
        </table:table-row>
        <table:table-row>
          <table:table-cell table:style-name="TabCell" office:value-type="string">
            <text:p text:style-name="Table_20_Contents"><text:span text:style-name="Code">ui/</text:span></text:p>
          </table:table-cell>
          <table:table-cell table:style-name="TabCell" office:value-type="string">
            <text:p text:style-name="Table_20_Contents">A HUD: az LCARS ablak, a rajzolt díszelemek, a hangeffektek.</text:p>
          </table:table-cell>
        </table:table-row>
        <table:table-row>
          <table:table-cell table:style-name="TabCell" office:value-type="string">
            <text:p text:style-name="Table_20_Contents"><text:span text:style-name="Code">zwift_api/</text:span></text:p>
          </table:table-cell>
          <table:table-cell table:style-name="TabCell" office:value-type="string">
            <text:p text:style-name="Table_20_Contents">Külön segédprogram (saját folyamatban fut!), amely a Zwift szerverét kérdezgeti, és az eredményt UDP-n „bedobja” a fő programnak.</text:p>
          </table:table-cell>
        </table:table-row>
      </table:table>
      <text:h text:style-name="Heading_20_2" text:outline-level="2">3. Mi történik indításkor? – lépésről lépésre</text:h>
      <text:list text:style-name="LNumber">
        <text:list-item>
          <text:p text:style-name="Text_20_body"><text:span text:style-name="Bold">Korai naplópuffer.</text:span> A program legelső dolga, hogy a naplóüzeneteket ideiglenesen a memóriában gyűjti. Miért? Mert azt, hogy szabad-e egyáltalán naplófájlt írni, csak a beállításokból tudja meg – amiket még be sem olvasott. Ha a naplózás engedélyezett, a korai üzenetek utólag a fájlba kerülnek; ha tiltott, nyomtalanul eldobja őket.</text:p>
        </text:list-item>
        <text:list-item>
          <text:p text:style-name="Text_20_body"><text:span text:style-name="Bold">Beállítások betöltése.</text:span> A <text:span text:style-name="Code">settings.json</text:span>-t a program a saját mappájában keresi (exe-ként futtatva az exe mellett). Ha nincs ilyen fájl, a gyári sablonból (<text:span text:style-name="Code">settings.default.json</text:span>) automatikusan létrehozza. Ha a fájl szintaktikailag hibás (pl. lemaradt egy vessző), félreteszi <text:span text:style-name="Code">settings.json.incorrect</text:span> néven – hogy a kézi módosításaid ne vesszenek el –, és az alapértelmezésekkel indul. Minden elgépelt mezőnevet és értéktartományon kívüli értéket ⚠ jellel jelez a naplóban.</text:p>
        </text:list-item>
        <text:list-item>
          <text:p text:style-name="Text_20_body"><text:span text:style-name="Bold">Naplózás élesítése.</text:span> A beállítás szerint: konzol + forgó naplófájl (<text:span text:style-name="Code">smart_fan_controller.log</text:span>, max. 500 KB, 2 régebbi példány), vagy teljes csend.</text:p>
        </text:list-item>
        <text:list-item>
          <text:p text:style-name="Text_20_body"><text:span text:style-name="Bold">Indulási összefoglaló.</text:span> A képernyőre kerül az FTP, a kiszámolt zónahatárok, a bufferek, a cooldown, a kiválasztott adatforrások – így egy pillantással ellenőrizheted, hogy azt tölti-e be, amit vártál.</text:p>
        </text:list-item>
        <text:list-item>
          <text:p text:style-name="Text_20_body"><text:span text:style-name="Bold">A vezérlő külön szálon indul.</text:span> Az összes adatkezelés egy háttérszálon futó asyncio eseményhurokban történik („AsyncioThread”). Windowson kifejezetten a megbízhatóbb SelectorEventLoop-ot használja.</text:p>
        </text:list-item>
        <text:list-item>
          <text:p text:style-name="Text_20_body"><text:span text:style-name="Bold">A HUD a fő szálon indul.</text:span> Ha a PySide6 (Qt) telepítve van, megjelenik az LCARS ablak és felhangzik a tricorder-nyitás hang. Ha nincs, a program szó nélkül „headless” üzemmódban fut, és Ctrl+C-vel állítható le.</text:p>
        </text:list-item>
      </text:list>
      <text:h text:style-name="Heading_20_2" text:outline-level="2">4. Zwift automatikus indítás (opcionális, csak Windows)</text:h>
      <text:p text:style-name="Text_20_body">Mielőtt bármi más elindulna, a vezérlő – ha a <text:span text:style-name="Code">zwift_auto_launch</text:span> be van kapcsolva – megnézi, fut-e a <text:span text:style-name="Code">ZwiftApp.exe</text:span>. Ha nem:</text:p>
      <text:list text:style-name="LNumber">
        <text:list-item>
          <text:p text:style-name="Text_20_body">megkeresi a <text:span text:style-name="Code">ZwiftLauncher.exe</text:span>-t (először a Windows registryben, aztán a szokásos telepítési mappákban, vagy a beállításban megadott útvonalon),</text:p>
        </text:list-item>
        <text:list-item>
          <text:p text:style-name="Text_20_body">elindítja, majd a pywinauto könyvtárral megvárja a Zwift Launcher ablakát – frissítés esetén akár többször újrapróbálkozva (10 próba, 30 másodpercenként),</text:p>
        </text:list-item>
        <text:list-item>
          <text:p text:style-name="Text_20_body">magától rákattint a „LET'S GO” gombra,</text:p>
        </text:list-item>
        <text:list-item>
          <text:p text:style-name="Text_20_body">és megvárja, míg a <text:span text:style-name="Code">ZwiftApp.exe</text:span> ténylegesen elindul (max. 4–6 perc).</text:p>
        </text:list-item>
      </text:list>
      <text:p text:style-name="Text_20_body">Ha a pywinauto nincs telepítve, a program csak vár, és neked kell a gombra kattintani. Ez az egész várakozás külön munkaszálon történik, tehát közben semmi más nem akad meg, és leállításkor azonnal megszakítható.</text:p>
      <text:h text:style-name="Heading_20_2" text:outline-level="2">5. Az adat útja – a szenzortól a ventilátorig</text:h>
      <text:p text:style-name="Text_20_body">A program szíve egy futószalag, amelyen az adat négy állomáson megy át. Az állomások között sorok (queue-k) vannak, így egyik lépés sem tudja feltartani a másikat.</text:p>
      <text:p text:style-name="Text_20_body"><text:span text:style-name="Bold">1. állomás – adatforrások.</text:span> A beállításoktól függ, melyik indul el:</text:p>
      <text:list text:style-name="LBullet">
        <text:list-item>
          <text:p text:style-name="Text_20_body"><text:span text:style-name="Code">power_source</text:span> / <text:span text:style-name="Code">hr_source</text:span> = <text:span text:style-name="Code">"ble"</text:span> → BLE szenzorkezelő(k) indulnak,</text:p>
        </text:list-item>
        <text:list-item>
          <text:p text:style-name="Text_20_body">… = <text:span text:style-name="Code">"antplus"</text:span> → az ANT+ szál indul,</text:p>
        </text:list-item>
        <text:list-item>
          <text:p text:style-name="Text_20_body">… = <text:span text:style-name="Code">"zwiftudp"</text:span> → elindul a Zwift-lekérdező segédprogram és az UDP-fogadó,</text:p>
        </text:list-item>
        <text:list-item>
          <text:p text:style-name="Text_20_body">… = <text:span text:style-name="Code">null</text:span> → az adott forrás (és a hozzá tartozó feldolgozó) el sem indul.</text:p>
        </text:list-item>
      </text:list>
      <text:p text:style-name="Text_20_body">Bármelyik forrás a nyers számokat (watt, bpm) a <text:span text:style-name="Code">raw_power_queue</text:span> ill. <text:span text:style-name="Code">raw_hr_queue</text:span> sorba teszi. Ha egy sor tele van (100 elem), a legrégebbi adat egyszerűen kimarad – edzésadatnál mindig a legfrissebb érték számít.</text:p>
      <text:p text:style-name="Text_20_body"><text:span text:style-name="Bold">2. állomás – feldolgozók (power processor, HR processor).</text:span> Mindkettő ugyanazt teszi a maga adatával:</text:p>
      <text:list text:style-name="LBullet">
        <text:list-item>
          <text:p text:style-name="Text_20_body"><text:span text:style-name="Bold">Ellenőrzés:</text:span> csak az értelmes adat megy tovább (watt: 0 és <text:span text:style-name="Code">max_watt</text:span> között, a <text:span text:style-name="Code">min_watt</text:span> alatti pozitív értékek kiszűrve; pulzus: az érvényes tartományban, alapból 30–220 bpm). A hibás adat – NaN, végtelen, rossz típus – csendben kiesik.</text:p>
        </text:list-item>
        <text:list-item>
          <text:p text:style-name="Text_20_body"><text:span text:style-name="Bold">Gördülő átlag:</text:span> a hirtelen kiugrások kisimítására a program nem az utolsó értékkel, hanem az utolsó néhány másodperc átlagával számol. A buffer mérete forrásfüggő (pl. BLE: 3 mp × 4 minta/mp; Zwift: 10 mp × 3 minta/mp – mert az lassabban frissül). Az átlagot „futó összeggel” tartja karban, így minden új mintánál csak egy összeadás-kivonás történik.</text:p>
        </text:list-item>
        <text:list-item>
          <text:p text:style-name="Text_20_body"><text:span text:style-name="Bold">Zóna-számítás:</text:span> az átlagból megállapítja a power- ill. HR-zónát. Wattnál a határok az FTP százalékai (alapból Z1 vége = 60%, Z2 vége = 89%); pulzusnál a maximális pulzus százalékai (70% / 80%), a nyugalmi pulzus alatt pedig 0. zóna.</text:p>
        </text:list-item>
        <text:list-item>
          <text:p text:style-name="Text_20_body">Az eredményt beírja a közös állapotba, frissíti a HUD pillanatképét, és jelez a zónavezérlőnek („van új adat, számolj!”).</text:p>
        </text:list-item>
      </text:list>
      <text:p text:style-name="Text_20_body"><text:span text:style-name="Bold">3. állomás – zónavezérlő.</text:span> Ez dönti el, ténylegesen hányas fokozatot kapjon a ventilátor:</text:p>
      <text:list text:style-name="LBullet">
        <text:list-item>
          <text:p text:style-name="Text_20_body">Először megnézi, <text:span text:style-name="Bold">friss-e</text:span> az adat: ha egy forrásból régebb óta nem jött semmi, mint a rá beállított időkorlát, azt a forrást nem veszi figyelembe.</text:p>
        </text:list-item>
        <text:list-item>
          <text:p text:style-name="Text_20_body">Aztán a <text:span text:style-name="Bold">zónamód</text:span> szerint kombinál: <text:span text:style-name="Code">power_only</text:span> = csak a watt számít; <text:span text:style-name="Code">hr_only</text:span> = csak a pulzus; <text:span text:style-name="Code">higher_wins</text:span> = a kettő közül a magasabb zóna nyer (ha az egyik éppen hiányzik, a másik dönt egyedül).</text:p>
        </text:list-item>
        <text:list-item>
          <text:p text:style-name="Text_20_body">Végül jön a <text:span text:style-name="Bold">cooldown</text:span> (lásd a következő fejezetet), és ha tényleg váltani kell, a parancs a ventilátor-sorba kerül.</text:p>
        </text:list-item>
      </text:list>
      <text:p text:style-name="Text_20_body"><text:span text:style-name="Bold">4. állomás – BLE ventilátor-kimenet.</text:span> A parancssor mérete szándékosan 1: ha gyors egymásutánban több zónaváltás jönne, mindig csak a legutolsó megy ki – a ventilátornak úgyis csak a végállapot számít.</text:p>
      <text:h text:style-name="Heading_20_2" text:outline-level="2">6. A cooldown – miért nem kapcsolgat le-föl a ventilátor?</text:h>
      <text:p text:style-name="Text_20_body">Zóna-<text:span text:style-name="Bold">emelkedésnél</text:span> a váltás azonnali: ha rákapcsolsz, azonnal jön a szél. Zóna-<text:span text:style-name="Bold">csökkenésnél</text:span> viszont a program vár (alapból 120 másodpercet), mert edzés közben a terhelés hullámzik – bosszantó lenne, ha a ventilátor minden rövid lazításnál lekapcsolna, aztán újra felpörögne.</text:p>
      <text:p text:style-name="Text_20_body">A várakozás közben a cooldown „okosan” alkalmazkodik:</text:p>
      <text:list text:style-name="LBullet">
        <text:list-item>
          <text:p text:style-name="Text_20_body"><text:span text:style-name="Bold">Felezés:</text:span> ha nagyot esett a terhelés (legalább 2 zónát), vagy a cél a teljes leállás (0. zóna), a hátralévő idő megfeleződik – tényleg abbahagytad, felesleges sokáig fújni.</text:p>
        </text:list-item>
        <text:list-item>
          <text:p text:style-name="Text_20_body"><text:span text:style-name="Bold">Duplázás:</text:span> ha a várakozás alatt közben visszaemelkedik a várható zóna (pl. 1-esről 2-esre), a hátralévő idő megduplázódik – látszik, hogy csak pillanatnyi lazítás volt.</text:p>
        </text:list-item>
        <text:list-item>
          <text:p text:style-name="Text_20_body">Mindkét módosítás <text:span text:style-name="Bold">egyszer</text:span> történhet meg váltakozva, hogy ne pattogjon az időzítés.</text:p>
        </text:list-item>
        <text:list-item>
          <text:p text:style-name="Text_20_body">Ha a várakozás alatt eléred vagy meghaladod az aktuális zónát, a cooldown törlődik, és emelkedésnél azonnal vált.</text:p>
        </text:list-item>
      </text:list>
      <text:p text:style-name="Text_20_body">Kivétel: ha a <text:span text:style-name="Code">zero_power_immediate</text:span> (vagy <text:span text:style-name="Code">zero_hr_immediate</text:span>) be van kapcsolva, 0 watt (ill. nyugalmi pulzus alá esés) esetén a ventilátor <text:span text:style-name="Bold">azonnal</text:span> leáll, cooldown nélkül – leszálltál a bringáról, nem kell tovább fújni.</text:p>
      <text:h text:style-name="Heading_20_2" text:outline-level="2">7. Kiesés-figyelés (dropout checker)</text:h>
      <text:p text:style-name="Text_20_body">Egy külön kis őrszem másodpercenként ellenőrzi: jött-e mostanában adat? Ha a zónamód szerint szükséges forrás(ok) elhallgattak – mert lemerült a szenzor, kihúztad a sticket, kilépett a Zwift –, akkor:</text:p>
      <text:list text:style-name="LBullet">
        <text:list-item>
          <text:p text:style-name="Text_20_body">a ventilátor <text:span text:style-name="Bold">azonnal</text:span> <text:span text:style-name="Code">LEVEL:0</text:span> parancsot kap (biztonságos alapállapot),</text:p>
        </text:list-item>
        <text:list-item>
          <text:p text:style-name="Text_20_body">a kiesett forrás átlagoló-buffere kiürül (visszatéréskor ne keveredjen a régi adat az újjal),</text:p>
        </text:list-item>
        <text:list-item>
          <text:p text:style-name="Text_20_body">és az esetleg futó cooldown is törlődik.</text:p>
        </text:list-item>
      </text:list>
      <text:p text:style-name="Text_20_body"><text:span text:style-name="Code">higher_wins</text:span> módban csak akkor van teljes leállás, ha <text:span text:style-name="Bold">mindkét</text:span> forrás kiesett – amíg az egyik él, az vezérel tovább.</text:p>
      <text:h text:style-name="Heading_20_2" text:outline-level="2">8. A BLE ventilátor-kapcsolat közelebbről</text:h>
      <text:list text:style-name="LBullet">
        <text:list-item>
          <text:p text:style-name="Text_20_body"><text:span text:style-name="Bold">Keresés:</text:span> ha megadtál eszköznevet (pl. „FanController”), a program név szerint keres, és azonnal csatlakozik, amint az eszköz hirdet. Ha nem adtál meg nevet, automatikus felderítés fut: azt az eszközt választja, amelyik a beállított service UUID-t hirdeti. Minden megtalált BLE eszköz a konzolra és a <text:span text:style-name="Code">ble_devices.log</text:span> fájlba kerül – így könnyű kideríteni az eszközök nevét.</text:p>
        </text:list-item>
        <text:list-item>
          <text:p text:style-name="Text_20_body"><text:span text:style-name="Bold">PIN-azonosítás:</text:span> csatlakozás után a program elküldi az <text:span text:style-name="Code">AUTH:&lt;pin&gt;</text:span> parancsot. <text:span text:style-name="Code">AUTH_OK</text:span> válaszra megy tovább; <text:span text:style-name="Code">AUTH_FAIL</text:span>/<text:span text:style-name="Code">AUTH_LOCKED</text:span> esetén bontja a kapcsolatot, és a HUD villogó „PIN FAIL” felirattal jelzi, hogy a <text:span text:style-name="Code">settings.json</text:span>-ban rossz a PIN. (Ha az eszköz nem válaszol az AUTH-ra, a program türelmes, és PIN nélkül folytatja.)</text:p>
        </text:list-item>
        <text:list-item>
          <text:p text:style-name="Text_20_body"><text:span text:style-name="Bold">Csatlakozás után</text:span> elküldi a <text:span text:style-name="Code">ROLLER:1</text:span> parancsot (görgő-funkció bekapcsolása), és kiírja az eszköz összes GATT characteristic-jét – hasznos hibakereséshez.</text:p>
        </text:list-item>
        <text:list-item>
          <text:p text:style-name="Text_20_body"><text:span text:style-name="Bold">Újracsatlakozás:</text:span> ha a kapcsolat megszakad, egy háttérfolyamat a beállított időközönként (alapból 5 mp) újrapróbálkozik. Fontos: a zónaparancs-feldolgozás emiatt <text:span text:style-name="Bold">soha nem áll meg</text:span> – kapcsolat nélkül a program csak megjegyzi az utoljára kért zónát, és sikeres újracsatlakozás után magától kiküldi. A megadott számú sikertelen próbálkozás (alapból 10) után 30 másodperc szünetet tart, majd elölről kezdi.</text:p>
        </text:list-item>
        <text:list-item>
          <text:p text:style-name="Text_20_body"><text:span text:style-name="Bold">Parancsküldés</text:span> időkorláttal történik (alapból 3 mp); ha beragad, a program bontja a kapcsolatot, és az újracsatlakozásra bízza a helyreállást.</text:p>
        </text:list-item>
      </text:list>
      <text:h text:style-name="Heading_20_2" text:outline-level="2">9. Az ANT+ ág (ha a forrás „antplus”)</text:h>
      <text:p text:style-name="Text_20_body">Az ANT+ könyvtár (openant) blokkoló módon működik, ezért <text:span text:style-name="Bold">saját szálon</text:span> fut („ANTPlus-Thread”). A beérkező watt/pulzus értékeket szálbiztos módon adja át az asyncio-oldali soroknak.</text:p>
      <text:list text:style-name="LBullet">
        <text:list-item>
          <text:p text:style-name="Text_20_body"><text:span text:style-name="Bold">Eszközválasztás:</text:span> ha megadtál eszköz-azonosítót (<text:span text:style-name="Code">ant_power_device_id</text:span> / <text:span text:style-name="Code">ant_hr_device_id</text:span>), célzottan arra kapcsolódik; 0 esetén az első megtalált eszközre („wildcard”). A megtalált eszközök az <text:span text:style-name="Code">ant_devices.log</text:span>-ba kerülnek.</text:p>
        </text:list-item>
        <text:list-item>
          <text:p text:style-name="Text_20_body"><text:span text:style-name="Bold">Őrkutya (watchdog):</text:span> az openant sajátossága, hogy USB-kihúzáskor nem áll le magától – csak „némán vár”. Ezért egy külön őrszem-szál figyeli: ha 30 másodpercig semmilyen ANT+ adás nem érkezik (a 0 wattos „nem tekersz” csomagok is számítanak életjelnek!), kívülről leállítja a vevőt, mire az újracsatlakozási logika lép működésbe. Ha az eszköz sosem volt meg (pl. rossz azonosító), 60 másodperc után próbálkozik újra.</text:p>
        </text:list-item>
        <text:list-item>
          <text:p text:style-name="Text_20_body"><text:span text:style-name="Bold">Türelmes indulás:</text:span> az első pár sikertelen próbálkozás (tipikus, ártalmatlan USB-inicializálási hibák) csak a fejlesztői naplóba kerül – a felhasználót csak tartós hiba esetén zavarja üzenet. Ha a hiba a hiányzó USB-meghajtóra utal, a program célzott tanácsot ír ki (WinUSB/Zadig telepítés).</text:p>
        </text:list-item>
      </text:list>
      <text:h text:style-name="Heading_20_2" text:outline-level="2">10. A Zwift API ág (ha a forrás „zwiftudp”)</text:h>
      <text:p text:style-name="Text_20_body">Ez az ág két részből áll:</text:p>
      <text:p text:style-name="Text_20_body"><text:span text:style-name="Bold">a) A lekérdező segédprogram</text:span> (<text:span text:style-name="Code">smart_fan_controller.zwift_api</text:span>) – a fő program <text:span text:style-name="Bold">külön folyamatként</text:span> indítja el (Windowson kérésre saját konzolablakban). Működése:</text:p>
      <text:list text:style-name="LNumber">
        <text:list-item>
          <text:p text:style-name="Text_20_body">Bejelentkezik a Zwift szerverére a <text:span text:style-name="Code">settings.json</text:span> <text:span text:style-name="Code">zwift_api</text:span> szekciójában (vagy a <text:span text:style-name="Code">ZWIFT_USERNAME</text:span>/<text:span text:style-name="Code">ZWIFT_PASSWORD</text:span> környezeti változókban) megadott fiókkal. A hozzáférési tokent lejárat előtt automatikusan megújítja, szükség esetén újra bejelentkezik.</text:p>
        </text:list-item>
        <text:list-item>
          <text:p text:style-name="Text_20_body">Lekéri a profilodat (ebből tudja a versenyző-azonosítódat), majd kideríti, melyik Zwift-világban tekersz éppen.</text:p>
        </text:list-item>
        <text:list-item>
          <text:p text:style-name="Text_20_body">Ezután pár másodpercenként (alapból 3 mp) lekérdezi az aktuális állapotodat. A Zwift bináris (protobuf) formátumban válaszol – a program egy beépített mini-dekóderrel olvassa ki belőle a wattot, pulzust, pedálfordulatot és sebességet.</text:p>
        </text:list-item>
        <text:list-item>
          <text:p text:style-name="Text_20_body">Az eredményt egyszerű JSON-üzenetként (<text:span text:style-name="Code">{"power": …, "heartrate": …}</text:span>) UDP-n elküldi a fő programnak (alapból a 127.0.0.1:7878 címre).</text:p>
        </text:list-item>
        <text:list-item>
          <text:p text:style-name="Text_20_body">Hálózati hiba esetén fokozatosan növekvő szünetekkel próbálkozik újra; a Zwift kérés-korlátozását (429) is kezeli.</text:p>
        </text:list-item>
        <text:list-item>
          <text:p text:style-name="Text_20_body">Figyeli a <text:span text:style-name="Code">ZwiftApp.exe</text:span>-t: max. 5 percet vár az indulására, és ha a Zwift kilép, ő is leáll.</text:p>
        </text:list-item>
      </text:list>
      <text:p text:style-name="Text_20_body"><text:span text:style-name="Bold">b) Az UDP-fogadó</text:span> a fő programban: teljesen eseményvezérelt, a beérkező JSON-csomagokat ellenőrzi (ugyanazokkal a szabályokkal, mint a feldolgozók), és a megfelelő sorokba teszi. Ha csak a power forrása a Zwift, a pulzus-mezőt figyelmen kívül hagyja (és fordítva).</text:p>
      <text:p text:style-name="Text_20_body">Ha hiányoznak a Zwift bejelentkezési adatok, a fő program már induláskor jól látható figyelmeztetést ír – a segédprogram pedig hibaüzenettel, tisztán kilép.</text:p>
      <text:h text:style-name="Heading_20_2" text:outline-level="2">11. A HUD – mit látsz a képernyőn?</text:h>
      <text:p text:style-name="Text_20_body">A HUD egy keret nélküli, mindig legfelül lebegő, lekerekített sarkú, félig átlátszó kártya. Fél másodpercenként frissül, és mindig a vezérlő szálbiztos „pillanatképéből” olvas – tehát a megjelenítés soha nem tudja megakasztani az adatfeldolgozást.</text:p>
      <text:list text:style-name="LBullet">
        <text:list-item>
          <text:p text:style-name="Text_20_body"><text:span text:style-name="Bold">FAN ZONE:</text:span> az aktuális zóna neve (STANDBY / ZONE 1–3) zónaszínnel, alatta négyszelvényes zónasáv.</text:p>
        </text:list-item>
        <text:list-item>
          <text:p text:style-name="Text_20_body"><text:span text:style-name="Bold">Állapotcsempék:</text:span> ZPO IMM (0 W azonnali leállás), ZHR IMM, HI WINS (higher_wins mód), ANT+, BLE, COOL (cooldown fut) – az aktív csempék finoman villognak.</text:p>
        </text:list-item>
        <text:list-item>
          <text:p text:style-name="Text_20_body"><text:span text:style-name="Bold">POWER / HEART RATE sorok:</text:span> az átlagolt watt és pulzus; értékváltozáskor rövid felvillanás. Alattuk vékony mérősávok: a watt az FTP-hez, a pulzus a nyugalmi–maximum tartományhoz képest, a zóna színével.</text:p>
        </text:list-item>
        <text:list-item>
          <text:p text:style-name="Text_20_body"><text:span text:style-name="Bold">Állapotsorok:</text:span> BLE FAN (ONLINE / villogó OFFLINE / PIN FAIL / DISABLED), BLE SEN., ANT+ SEN. és ZWIFT – az utóbbiak <text:span text:style-name="Code">P:OK  HR:OK</text:span> formában mutatják forrásonként, él-e az adat. A „friss adat” ablak szándékosan bőkezű (10 mp), hogy gurulás közben (0 W-nál elhallgató wattmérő) ne villogjon feleslegesen FAIL.</text:p>
        </text:list-item>
        <text:list-item>
          <text:p text:style-name="Text_20_body"><text:span text:style-name="Bold">LAST TX:</text:span> hány másodperce ment ki az utolsó parancs a ventilátornak. <text:span text:style-name="Bold">COOLDOWN:</text:span> a hátralévő idő.</text:p>
        </text:list-item>
        <text:list-item>
          <text:p text:style-name="Text_20_body"><text:span text:style-name="Bold">OPACITY csúszka:</text:span> az ablak átlátszósága (20–100%).</text:p>
        </text:list-item>
      </text:list>
      <text:p text:style-name="Text_20_body"><text:span text:style-name="Bold">Kezelés:</text:span> az ablak bárhová húzható, a jobb alsó sarkánál átméretezhető – ilyenkor a teljes tartalom (betűk, sávok, díszek) arányosan skálázódik. Jobb klikkre menü: bezárás, átlátszóság-gyorsválasztó, hangok ki/be, hangerő. Ha a <text:span text:style-name="Code">save_hud_settings</text:span> engedélyezett, a program az ablak helyzetét <text:span text:style-name="Bold">monitoronként</text:span> megjegyzi (mozgatás után pár másodperccel automatikusan menti, csak a „hud” szekciót írva át – a kézi beállításaidhoz nem nyúl), és következő induláskor ugyanoda teszi vissza. Ha a mentett monitor már nincs bekötve, a fő monitorra igazít.</text:p>
      <text:p text:style-name="Text_20_body"><text:span text:style-name="Bold">Hangok:</text:span> minden eseménynek saját LCARS-hangja van – indulás/leállás (tricorder), zóna fel/le/standby, szenzor-kiesés és -visszatérés, Zwift-kapcsolat, parancs-kiküldés. A hangok sima WAV fájlok a <text:span text:style-name="Code">sounds/</text:span> mappában, szabadon lecserélhetők.</text:p>
      <text:p text:style-name="Text_20_body"><text:span text:style-name="Bold">Zwift-figyelés:</text:span> ha a <text:span text:style-name="Code">close_at_zwiftapp_exe</text:span> be van kapcsolva, a HUD kb. 10 másodpercenként (háttérszálon, hogy az ablak ne akadjon) megnézi, fut-e még a <text:span text:style-name="Code">ZwiftApp.exe</text:span>. Ha a Zwift kilépett – vagy 5 percen belül el sem indult –, a program magától, szabályosan leáll.</text:p>
      <text:h text:style-name="Heading_20_2" text:outline-level="2">12. Leállítás – mindig ugyanaz a rendezett sorrend</text:h>
      <text:p text:style-name="Text_20_body">Akár a HUD-ot zárod be, akár Ctrl+C-t nyomsz, akár a Zwift kilépése váltja ki, a leállás menete azonos:</text:p>
      <text:list text:style-name="LNumber">
        <text:list-item>
          <text:p text:style-name="Text_20_body">Felhangzik a tricorder-becsukás hang (a tényleges bezárás megvárja a végét).</text:p>
        </text:list-item>
        <text:list-item>
          <text:p text:style-name="Text_20_body">A vezérlő minden feldolgozó-feladatot leállít, a Zwift-lekérdező segédfolyamatot szabályosan megállítja (ha 5 mp alatt nem áll le, kényszerrel), az ANT+ szálat leállítja.</text:p>
        </text:list-item>
        <text:list-item>
          <text:p text:style-name="Text_20_body">A ventilátor <text:span text:style-name="Bold">garantáltan</text:span> megkapja a <text:span text:style-name="Code">LEVEL:0</text:span> és <text:span text:style-name="Code">ROLLER:0</text:span> parancsokat – nem marad forogva –, majd a BLE kapcsolat bontódik.</text:p>
        </text:list-item>
        <text:list-item>
          <text:p text:style-name="Text_20_body">A napló utolsó sora: „Program leállítva.”</text:p>
        </text:list-item>
      </text:list>
      <text:h text:style-name="Heading_20_2" text:outline-level="2">13. Naplózás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Fájl</text:p>
          </table:table-cell>
          <table:table-cell table:style-name="TabHead" office:value-type="string">
            <text:p text:style-name="Table_20_Heading">Tartalma</text:p>
          </table:table-cell>
        </table:table-row>
        <table:table-row>
          <table:table-cell table:style-name="TabCell" office:value-type="string">
            <text:p text:style-name="Table_20_Contents"><text:span text:style-name="Code">smart_fan_controller.log</text:span></text:p>
          </table:table-cell>
          <table:table-cell table:style-name="TabCell" office:value-type="string">
            <text:p text:style-name="Table_20_Contents">A fő program teljes naplója (a felhasználói üzenetek és a részletes fejlesztői napló együtt). Forgó fájl: max. 500 KB, 2 régebbi példánnyal.</text:p>
          </table:table-cell>
        </table:table-row>
        <table:table-row>
          <table:table-cell table:style-name="TabCell" office:value-type="string">
            <text:p text:style-name="Table_20_Contents"><text:span text:style-name="Code">zwift_api_polling.log</text:span></text:p>
          </table:table-cell>
          <table:table-cell table:style-name="TabCell" office:value-type="string">
            <text:p text:style-name="Table_20_Contents">A Zwift-lekérdező segédprogram saját naplója (külön folyamat, külön fájl).</text:p>
          </table:table-cell>
        </table:table-row>
        <table:table-row>
          <table:table-cell table:style-name="TabCell" office:value-type="string">
            <text:p text:style-name="Table_20_Contents"><text:span text:style-name="Code">ble_devices.log</text:span></text:p>
          </table:table-cell>
          <table:table-cell table:style-name="TabCell" office:value-type="string">
            <text:p text:style-name="Table_20_Contents">Minden valaha látott BLE eszköz (név, cím, szolgáltatások) – csak az újak kerülnek bele.</text:p>
          </table:table-cell>
        </table:table-row>
        <table:table-row>
          <table:table-cell table:style-name="TabCell" office:value-type="string">
            <text:p text:style-name="Table_20_Contents"><text:span text:style-name="Code">ant_devices.log</text:span></text:p>
          </table:table-cell>
          <table:table-cell table:style-name="TabCell" office:value-type="string">
            <text:p text:style-name="Table_20_Contents">A megtalált ANT+ eszközök.</text:p>
          </table:table-cell>
        </table:table-row>
      </table:table>
      <text:p text:style-name="Text_20_body">A konzolon csak a lényeg jelenik meg (tiszta, időbélyeg nélküli üzenetek); a fájlban minden, időbélyeggel. A <text:span text:style-name="Code">logging: false</text:span> beállítással a program teljesen néma, és egyetlen fájlt sem ír – de az indulási összefoglaló ilyenkor is megjelenik a képernyőn.</text:p>
      <text:h text:style-name="Heading_20_2" text:outline-level="2">14. Párhuzamosság – mi fut egyszerre?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Szál / feladat</text:p>
          </table:table-cell>
          <table:table-cell table:style-name="TabHead" office:value-type="string">
            <text:p text:style-name="Table_20_Heading">Mikor fut?</text:p>
          </table:table-cell>
          <table:table-cell table:style-name="TabHead" office:value-type="string">
            <text:p text:style-name="Table_20_Heading">Mit csinál?</text:p>
          </table:table-cell>
        </table:table-row>
        <table:table-row>
          <table:table-cell table:style-name="TabCell" office:value-type="string">
            <text:p text:style-name="Table_20_Contents">Fő szál (Qt)</text:p>
          </table:table-cell>
          <table:table-cell table:style-name="TabCell" office:value-type="string">
            <text:p text:style-name="Table_20_Contents">ha van PySide6</text:p>
          </table:table-cell>
          <table:table-cell table:style-name="TabCell" office:value-type="string">
            <text:p text:style-name="Table_20_Contents">A HUD ablak és a hangok; 500 ms-onként frissít.</text:p>
          </table:table-cell>
        </table:table-row>
        <table:table-row>
          <table:table-cell table:style-name="TabCell" office:value-type="string">
            <text:p text:style-name="Table_20_Contents">AsyncioThread</text:p>
          </table:table-cell>
          <table:table-cell table:style-name="TabCell" office:value-type="string">
            <text:p text:style-name="Table_20_Contents">mindig</text:p>
          </table:table-cell>
          <table:table-cell table:style-name="TabCell" office:value-type="string">
            <text:p text:style-name="Table_20_Contents">Az összes adatkezelés: BLE ventilátor, BLE szenzorok, UDP-fogadó, feldolgozók, zónavezérlő, kiesés-figyelő – egyetlen eseményhurokban, egymást nem blokkolva.</text:p>
          </table:table-cell>
        </table:table-row>
        <table:table-row>
          <table:table-cell table:style-name="TabCell" office:value-type="string">
            <text:p text:style-name="Table_20_Contents">ANTPlus-Thread + őrszeme</text:p>
          </table:table-cell>
          <table:table-cell table:style-name="TabCell" office:value-type="string">
            <text:p text:style-name="Table_20_Contents">ha ANT+ forrás van</text:p>
          </table:table-cell>
          <table:table-cell table:style-name="TabCell" office:value-type="string">
            <text:p text:style-name="Table_20_Contents">Az openant blokkoló vevője + a beragadás-figyelő watchdog.</text:p>
          </table:table-cell>
        </table:table-row>
        <table:table-row>
          <table:table-cell table:style-name="TabCell" office:value-type="string">
            <text:p text:style-name="Table_20_Contents">zwift_api segédfolyamat</text:p>
          </table:table-cell>
          <table:table-cell table:style-name="TabCell" office:value-type="string">
            <text:p text:style-name="Table_20_Contents">ha zwiftudp forrás van</text:p>
          </table:table-cell>
          <table:table-cell table:style-name="TabCell" office:value-type="string">
            <text:p text:style-name="Table_20_Contents">Külön processz: Zwift-lekérdezés és UDP-küldés.</text:p>
          </table:table-cell>
        </table:table-row>
        <table:table-row>
          <table:table-cell table:style-name="TabCell" office:value-type="string">
            <text:p text:style-name="Table_20_Contents">ZwiftProcessCheck</text:p>
          </table:table-cell>
          <table:table-cell table:style-name="TabCell" office:value-type="string">
            <text:p text:style-name="Table_20_Contents">HUD + figyelés bekapcsolva</text:p>
          </table:table-cell>
          <table:table-cell table:style-name="TabCell" office:value-type="string">
            <text:p text:style-name="Table_20_Contents">Rövid életű háttérszál 10 mp-enként: fut-e a ZwiftApp.exe.</text:p>
          </table:table-cell>
        </table:table-row>
      </table:table>
      <text:p text:style-name="Text_20_body">A szálak közötti adatcsere mindenütt védett: az asyncio-oldali közös állapotot zár (lock) őrzi, a HUD egy külön, szálbiztos pillanatképből olvas, a cooldown-vezérlő pedig saját zárral rendelkezik. Minden feldolgozó-feladat „védőburokban” fut: ha váratlan hiba történne benne, az a naplóba kerül, és a kritikus feladatok automatikusan újraindulnak – egyetlen hiba sem tudja csendben megölni a programot.</text:p>
      <text:h text:style-name="Heading_20_2" text:outline-level="2">15. A beállítások dióhéjban (settings.json)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Szekció</text:p>
          </table:table-cell>
          <table:table-cell table:style-name="TabHead" office:value-type="string">
            <text:p text:style-name="Table_20_Heading">Mit szabályoz?</text:p>
          </table:table-cell>
        </table:table-row>
        <table:table-row>
          <table:table-cell table:style-name="TabCell" office:value-type="string">
            <text:p text:style-name="Table_20_Contents"><text:span text:style-name="Code">global_settings</text:span></text:p>
          </table:table-cell>
          <table:table-cell table:style-name="TabCell" office:value-type="string">
            <text:p text:style-name="Table_20_Contents">Cooldown hossza, alapértelmezett buffer/mintaszám, kiesési időkorlát, naplózás ki/be és a naplók helye.</text:p>
          </table:table-cell>
        </table:table-row>
        <table:table-row>
          <table:table-cell table:style-name="TabCell" office:value-type="string">
            <text:p text:style-name="Table_20_Contents"><text:span text:style-name="Code">power_zones</text:span></text:p>
          </table:table-cell>
          <table:table-cell table:style-name="TabCell" office:value-type="string">
            <text:p text:style-name="Table_20_Contents">FTP, érvényes watt-tartomány, zónahatár-százalékok, 0 W-os azonnali leállás.</text:p>
          </table:table-cell>
        </table:table-row>
        <table:table-row>
          <table:table-cell table:style-name="TabCell" office:value-type="string">
            <text:p text:style-name="Table_20_Contents"><text:span text:style-name="Code">heart_rate_zones</text:span></text:p>
          </table:table-cell>
          <table:table-cell table:style-name="TabCell" office:value-type="string">
            <text:p text:style-name="Table_20_Contents">HR ki/be, max. és nyugalmi pulzus, zónahatárok, zónamód (power_only / hr_only / higher_wins), érvényes bpm-tartomány.</text:p>
          </table:table-cell>
        </table:table-row>
        <table:table-row>
          <table:table-cell table:style-name="TabCell" office:value-type="string">
            <text:p text:style-name="Table_20_Contents"><text:span text:style-name="Code">ble_fan</text:span></text:p>
          </table:table-cell>
          <table:table-cell table:style-name="TabCell" office:value-type="string">
            <text:p text:style-name="Table_20_Contents">A ventilátor-vezérlő eszköz neve (vagy üresen: auto-felderítés), PIN-kód, UUID-k, időkorlátok, újracsatlakozási paraméterek.</text:p>
          </table:table-cell>
        </table:table-row>
        <table:table-row>
          <table:table-cell table:style-name="TabCell" office:value-type="string">
            <text:p text:style-name="Table_20_Contents"><text:span text:style-name="Code">datasource</text:span></text:p>
          </table:table-cell>
          <table:table-cell table:style-name="TabCell" office:value-type="string">
            <text:p text:style-name="Table_20_Contents">A power- és HR-forrás kiválasztása, forrásonkénti buffer-beállítások, ANT+ eszköz-azonosítók, BLE szenzornevek, Zwift UDP cím/port, Zwift auto-indítás.</text:p>
          </table:table-cell>
        </table:table-row>
        <table:table-row>
          <table:table-cell table:style-name="TabCell" office:value-type="string">
            <text:p text:style-name="Table_20_Contents"><text:span text:style-name="Code">hud</text:span></text:p>
          </table:table-cell>
          <table:table-cell table:style-name="TabCell" office:value-type="string">
            <text:p text:style-name="Table_20_Contents">Hangok ki/be és hangerő, átlátszóság, ablakpozíció-mentés, Zwift-kilépés figyelés.</text:p>
          </table:table-cell>
        </table:table-row>
        <table:table-row>
          <table:table-cell table:style-name="TabCell" office:value-type="string">
            <text:p text:style-name="Table_20_Contents"><text:span text:style-name="Code">zwift_api</text:span></text:p>
          </table:table-cell>
          <table:table-cell table:style-name="TabCell" office:value-type="string">
            <text:p text:style-name="Table_20_Contents">Zwift felhasználónév/jelszó, lekérdezési gyakoriság, külön konzolablak.</text:p>
          </table:table-cell>
        </table:table-row>
      </table:table>
      <text:p text:style-name="Text_20_body">Részletes, mezőnkénti leírás a <text:span text:style-name="Code">CONFIGURATION.md</text:span>-ben, kommentezett példa a <text:span text:style-name="Code">settings.example.jsonc</text:span>-ben található.</text:p>
      <text:h text:style-name="Heading_20_2" text:outline-level="2">16. Egy példa-kör – így áll össze az egész</text:h>
      <text:p text:style-name="Text_20_body">Tegyük fel: Zwift a power-forrás, BLE pulzusmérő a HR-forrás, higher_wins mód, FTP 200 W.</text:p>
      <text:list text:style-name="LNumber">
        <text:list-item>
          <text:p text:style-name="Text_20_body">Elindítod a programot. Betölti a beállításokat, elindítja a Zwiftet (ha kell), a Zwift-lekérdezőt, a BLE pulzus-figyelőt, és csatlakozik a ventilátorhoz (<text:span text:style-name="Code">ROLLER:1</text:span>).</text:p>
        </text:list-item>
        <text:list-item>
          <text:p text:style-name="Text_20_body">Tekerni kezdesz. A Zwift-ből 3 mp-enként érkezik a watt, a pulzusmérőtől másodpercenként a bpm. Pár másodperc alatt összegyűlik elég minta az átlagokhoz.</text:p>
        </text:list-item>
        <text:list-item>
          <text:p text:style-name="Text_20_body">170 wattos átlagnál a power-zóna 2 (FTP 60–89%-a), a pulzusod alapján a HR-zóna 1 → higher_wins: <text:span text:style-name="Bold">2. zóna</text:span>. A ventilátor megkapja: <text:span text:style-name="Code">LEVEL:2</text:span>. A HUD-on „ZONE 2”, hangeffekt, a LAST TX nullázódik.</text:p>
        </text:list-item>
        <text:list-item>
          <text:p text:style-name="Text_20_body">Lazítasz, az átlag 100 wattra esik (1. zóna). A ventilátor <text:span text:style-name="Bold">nem</text:span> vált azonnal: elindul a 120 mp-es cooldown, a HUD COOL csempéje villog, a visszaszámlálás látszik. Ha közben újra rákapcsolsz, a cooldown törlődik; ha nem, 2 perc múlva jön a <text:span text:style-name="Code">LEVEL:1</text:span>.</text:p>
        </text:list-item>
        <text:list-item>
          <text:p text:style-name="Text_20_body">A kör végén megállsz. 0 watt → (ha a <text:span text:style-name="Code">zero_power_immediate</text:span> aktív) azonnali <text:span text:style-name="Code">LEVEL:0</text:span>. Kilépsz a Zwiftből → a lekérdező leáll, a HUD észleli a Zwift kilépését, tricorder-hang, és a program rendezetten, a ventilátort lekapcsolva kilé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, 'Times New Roman', serif"/>
    <style:font-face style:name="Liberation Sans" svg:font-family="'Liberation Sans', Arial, sans-serif"/>
    <style:font-face style:name="Liberation Mono" svg:font-family="'Liberation Mono', 'Courier New', monospace"/>
  </office:font-face-decls>
  <office:styles>
    <style:default-style style:family="paragraph">
      <style:paragraph-properties fo:hyphenation-ladder-count="no-limit"/>
      <style:text-properties style:font-name="Liberation Serif" fo:font-size="11pt" fo:language="hu" fo:country="HU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5cm" fo:line-height="115%"/>
    </style:style>
    <style:style style:name="Title" style:family="paragraph" style:parent-style-name="Standard" style:class="chapter">
      <style:paragraph-properties fo:margin-top="0cm" fo:margin-bottom="0.4cm"/>
      <style:text-properties style:font-name="Liberation Sans" fo:font-size="20pt" fo:font-weight="bold" fo:color="#1a3d6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5cm" fo:margin-bottom="0.2cm" fo:keep-with-next="always"/>
      <style:text-properties style:font-name="Liberation Sans" fo:font-size="14pt" fo:font-weight="bold" fo:color="#1a3d6d"/>
    </style:style>
    <style:style style:name="Table_20_Contents" style:display-name="Table Contents" style:family="paragraph" style:parent-style-name="Standard" style:class="extra">
      <style:paragraph-properties fo:margin-top="0.05cm" fo:margin-bottom="0.05cm"/>
      <style:text-properties fo:font-size="10pt"/>
    </style:style>
    <style:style style:name="Table_20_Heading" style:display-name="Table Heading" style:family="paragraph" style:parent-style-name="Table_20_Contents" style:class="extra">
      <style:text-properties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Code" style:family="text">
      <style:text-properties style:font-name="Liberation Mono" fo:font-size="10pt" fo:background-color="#f0f0f0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Smart Fan Controller – működési leírás</dc:title>
    <meta:generator>smart_fan_controller docs generator</meta:generator>
  </office:meta>
</office:document-meta>
</file>
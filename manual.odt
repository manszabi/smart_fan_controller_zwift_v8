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2">
  <office:automatic-styles>
    <style:style style:name="TabWide" style:family="table">
      <style:table-properties style:width="17cm" table:align="margins" fo:margin-top="0.2cm" fo:margin-bottom="0.3cm"/>
    </style:style>
    <style:style style:name="TabCell" style:family="table-cell">
      <style:table-cell-properties fo:border="0.5pt solid #808080" fo:padding="0.1cm"/>
    </style:style>
    <style:style style:name="TabHead" style:family="table-cell">
      <style:table-cell-properties fo:border="0.5pt solid #808080" fo:padding="0.1cm" fo:background-color="#dce6f1"/>
    </style:style>
    <text:list-style style:name="LBullet">
      <text:list-level-style-bullet text:level="1" text:bullet-char="•">
        <style:list-level-properties text:space-before="0.4cm" text:min-label-width="0.5cm"/>
      </text:list-level-style-bullet>
    </text:list-style>
    <text:list-style style:name="LNumber">
      <text:list-level-style-number text:level="1" style:num-suffix="." style:num-format="1">
        <style:list-level-properties text:space-before="0.4cm" text:min-label-width="0.6cm"/>
      </text:list-level-style-number>
    </text:list-style>
  </office:automatic-styles>
  <office:body>
    <office:text>
      <text:p text:style-name="Title">Smart Fan Controller – felhasználói kézikönyv</text:p>
      <text:p text:style-name="Text_20_body"><text:span text:style-name="Italic">Verzió: 8.1.1  |  Ez a kézikönyv a program telepítését, beállítását és mindennapi használatát mutatja be. A belső működés részletes leírását a <text:span text:style-name="Code">mukodes.odt</text:span>, a beállítások teljes referenciáját a <text:span text:style-name="Code">CONFIGURATION.md</text:span> tartalmazza.</text:span></text:p>
      <text:h text:style-name="Heading_20_2" text:outline-level="2">1. Mire való a program?</text:h>
      <text:p text:style-name="Text_20_body">A Smart Fan Controller beltéri kerékpáros edzés közben automatikusan vezérli a ventilátoro(ka)t: minél nagyobb a leadott teljesítményed (watt) vagy a pulzusod, annál erősebb fokozatra kapcsol, megálláskor pedig magától leáll. Neked edzés közben semmit nem kell nyomkodnod – egyszer beállítod, aztán csak tekersz.</text:p>
      <text:p text:style-name="Text_20_body">A vezérlés négy fokozatú: <text:span text:style-name="Bold">0</text:span> = kikapcsolva, <text:span text:style-name="Bold">1</text:span> = gyenge (1 ventilátor), <text:span text:style-name="Bold">2</text:span> = közepes (2 ventilátor), <text:span text:style-name="Bold">3</text:span> = maximum (3 ventilátor).</text:p>
      <text:h text:style-name="Heading_20_2" text:outline-level="2">2. Mire van szükséged?</text:h>
      <text:p text:style-name="Text_20_body"><text:span text:style-name="Bold">Hardver:</text:span></text:p>
      <text:list text:style-name="LBullet">
        <text:list-item>
          <text:p text:style-name="Text_20_body"><text:span text:style-name="Bold">ESP32-alapú ventilátor-vezérlő doboz</text:span> (Seeed Studio Xiao ESP32-C3 + relék, a hozzá tartozó <text:span text:style-name="Code">esp32_fan_controller.ino</text:span> firmware-rel, v5.2.0) – ez kapcsolja a ventilátorokat, és Bluetooth-on fogadja a parancsokat. <text:span text:style-name="Italic">A firmware külön projekt, nem része ennek a programcsomagnak.</text:span></text:p>
        </text:list-item>
        <text:list-item>
          <text:p text:style-name="Text_20_body"><text:span text:style-name="Bold">Adatforrás</text:span> – legalább egy az alábbiak közül:
  <text:list text:style-name="LBullet">
  <text:list-item><text:p text:style-name="Text_20_body">ANT+ USB vevő (pl. Garmin ANT+ Stick) + ANT+ wattmérő és/vagy pulzusmérő,</text:p></text:list-item>
  <text:list-item><text:p text:style-name="Text_20_body">Bluetooth-os (BLE) wattmérő és/vagy pulzusmérő,</text:p></text:list-item>
  <text:list-item><text:p text:style-name="Text_20_body">Zwift-fiók (a program a Zwift szerveréről is le tudja kérdezni az adataidat).</text:p></text:list-item>
  </text:list></text:p>
        </text:list-item>
        <text:list-item>
          <text:p text:style-name="Text_20_body">Számítógép Bluetooth-adapterrel (a ventilátor-vezérlőhöz mindenképp kell BLE).</text:p>
        </text:list-item>
      </text:list>
      <text:p text:style-name="Text_20_body"><text:span text:style-name="Bold">Szoftver:</text:span> Python 3.11 vagy újabb. Windowson ajánlott a mellékelt telepítő szkript (lásd lentebb). A program Raspberry Pi-n / Linuxon is fut (ott HUD nélkül, terminálban is használható).</text:p>
      <text:h text:style-name="Heading_20_2" text:outline-level="2">3. Telepítés</text:h>
      <text:p text:style-name="Text_20_body"><text:span text:style-name="Bold">Windows – a legegyszerűbb út:</text:span></text:p>
      <text:list text:style-name="LNumber">
        <text:list-item>
          <text:p text:style-name="Text_20_body">Töltsd le / másold a program mappáját a gépedre.</text:p>
        </text:list-item>
        <text:list-item>
          <text:p text:style-name="Text_20_body">Futtasd a <text:span text:style-name="Code">setup_windows.bat</text:span>-ot – ez létrehoz egy elkülönített Python-környezetet (venv), és feltelepíti az összes függőséget.</text:p>
        </text:list-item>
        <text:list-item>
          <text:p text:style-name="Text_20_body">Ezután a programot a <text:span text:style-name="Code">run.bat</text:span>-tal indíthatod.</text:p>
        </text:list-item>
      </text:list>
      <text:p text:style-name="Text_20_body"><text:span text:style-name="Bold">Kézi telepítés (bármely rendszeren):</text:span></text:p>
      <text:p text:style-name="Text_20_body"><text:span text:style-name="Code">pip install -r requirements.txt</text:span></text:p>
      <text:p text:style-name="Text_20_body">Fontos tudni: <text:span text:style-name="Bold">minden külső könyvtár opcionális</text:span>. A program magától észreveszi, mi van telepítve, és aszerint kapcsolja be/ki a funkciókat: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Csomag</text:p>
          </table:table-cell>
          <table:table-cell table:style-name="TabHead" office:value-type="string">
            <text:p text:style-name="Table_20_Heading">Mihez kell?</text:p>
          </table:table-cell>
          <table:table-cell table:style-name="TabHead" office:value-type="string">
            <text:p text:style-name="Table_20_Heading">Mi történik nélküle?</text:p>
          </table:table-cell>
        </table:table-row>
        <table:table-row>
          <table:table-cell table:style-name="TabCell" office:value-type="string">
            <text:p text:style-name="Table_20_Contents"><text:span text:style-name="Code">bleak</text:span></text:p>
          </table:table-cell>
          <table:table-cell table:style-name="TabCell" office:value-type="string">
            <text:p text:style-name="Table_20_Contents">Bluetooth: ventilátor-vezérlés + BLE szenzorok</text:p>
          </table:table-cell>
          <table:table-cell table:style-name="TabCell" office:value-type="string">
            <text:p text:style-name="Table_20_Contents">Nincs BLE kimenet/bemenet</text:p>
          </table:table-cell>
        </table:table-row>
        <table:table-row>
          <table:table-cell table:style-name="TabCell" office:value-type="string">
            <text:p text:style-name="Table_20_Contents"><text:span text:style-name="Code">openant</text:span></text:p>
          </table:table-cell>
          <table:table-cell table:style-name="TabCell" office:value-type="string">
            <text:p text:style-name="Table_20_Contents">ANT+ wattmérő / pulzusmérő</text:p>
          </table:table-cell>
          <table:table-cell table:style-name="TabCell" office:value-type="string">
            <text:p text:style-name="Table_20_Contents">Az ANT+ forrás nem elérhető</text:p>
          </table:table-cell>
        </table:table-row>
        <table:table-row>
          <table:table-cell table:style-name="TabCell" office:value-type="string">
            <text:p text:style-name="Table_20_Contents"><text:span text:style-name="Code">requests</text:span></text:p>
          </table:table-cell>
          <table:table-cell table:style-name="TabCell" office:value-type="string">
            <text:p text:style-name="Table_20_Contents">Zwift API lekérdezés</text:p>
          </table:table-cell>
          <table:table-cell table:style-name="TabCell" office:value-type="string">
            <text:p text:style-name="Table_20_Contents">A „zwiftudp” forrás nem működik</text:p>
          </table:table-cell>
        </table:table-row>
        <table:table-row>
          <table:table-cell table:style-name="TabCell" office:value-type="string">
            <text:p text:style-name="Table_20_Contents"><text:span text:style-name="Code">PySide6</text:span></text:p>
          </table:table-cell>
          <table:table-cell table:style-name="TabCell" office:value-type="string">
            <text:p text:style-name="Table_20_Contents">A HUD ablak és a hangok</text:p>
          </table:table-cell>
          <table:table-cell table:style-name="TabCell" office:value-type="string">
            <text:p text:style-name="Table_20_Contents">A program HUD nélkül, terminálban fut</text:p>
          </table:table-cell>
        </table:table-row>
        <table:table-row>
          <table:table-cell table:style-name="TabCell" office:value-type="string">
            <text:p text:style-name="Table_20_Contents"><text:span text:style-name="Code">pywinauto</text:span></text:p>
          </table:table-cell>
          <table:table-cell table:style-name="TabCell" office:value-type="string">
            <text:p text:style-name="Table_20_Contents">A Zwift automatikus elindítása (a „LET'S GO” gomb megnyomása)</text:p>
          </table:table-cell>
          <table:table-cell table:style-name="TabCell" office:value-type="string">
            <text:p text:style-name="Table_20_Contents">A gombra neked kell kattintani</text:p>
          </table:table-cell>
        </table:table-row>
      </table:table>
      <text:p text:style-name="Text_20_body"><text:span text:style-name="Bold">Önálló exe készítése (haladó):</text:span> a <text:span text:style-name="Code">build_exe.bat</text:span> PyInstallerrel egyetlen futtatható programot készít, amely Python-telepítés nélkül is működik.</text:p>
      <text:h text:style-name="Heading_20_2" text:outline-level="2">4. Első indítás és alapbeállítás</text:h>
      <text:p text:style-name="Text_20_body">Indítsd el a programot egyszer (<text:span text:style-name="Code">run.bat</text:span> vagy <text:span text:style-name="Code">python zwift_fan_controller.py</text:span>). Ekkor a program mappájában automatikusan létrejön a <text:span text:style-name="Bold"><text:span text:style-name="Code">settings.json</text:span></text:span> az alapértelmezett értékekkel. Állítsd le a programot, nyisd meg ezt a fájlt egy szövegszerkesztőben, és állítsd be a következőket:</text:p>
      <text:list text:style-name="LNumber">
        <text:list-item>
          <text:p text:style-name="Text_20_body"><text:span text:style-name="Bold">FTP</text:span> – a <text:span text:style-name="Code">power_zones</text:span> szekcióban az <text:span text:style-name="Code">ftp</text:span> mezőt írd át a saját küszöbteljesítményedre (watt). Ettől függenek a zónahatárok, ezért ez a legfontosabb beállítás.</text:p>
        </text:list-item>
        <text:list-item>
          <text:p text:style-name="Text_20_body"><text:span text:style-name="Bold">Adatforrások</text:span> – a <text:span text:style-name="Code">datasource</text:span> szekcióban a <text:span text:style-name="Code">power_source</text:span> és <text:span text:style-name="Code">hr_source</text:span> mezők értéke <text:span text:style-name="Code">"antplus"</text:span>, <text:span text:style-name="Code">"ble"</text:span>, <text:span text:style-name="Code">"zwiftudp"</text:span> vagy <text:span text:style-name="Code">null</text:span> (= az adott adat nincs használva) lehet. A kettő különbözhet is, pl. watt a Zwiftből, pulzus BLE mellkaspántról.</text:p>
        </text:list-item>
        <text:list-item>
          <text:p text:style-name="Text_20_body"><text:span text:style-name="Bold">Ventilátor-vezérlő</text:span> – a <text:span text:style-name="Code">ble_fan</text:span> szekcióban a <text:span text:style-name="Code">device_name</text:span> mezőbe írd az eszköz Bluetooth-nevét (a gyári firmware-nél <text:span text:style-name="Code">"FanController"</text:span>). Ha <text:span text:style-name="Code">null</text:span>-on hagyod, a program automatikusan megkeresi. A gyári PIN <text:span text:style-name="Code">"123456"</text:span> – ha a firmware-ben megváltoztattad, itt is írd át.</text:p>
        </text:list-item>
        <text:list-item>
          <text:p text:style-name="Text_20_body"><text:span text:style-name="Bold">Zwift-fiók</text:span> (csak ha „zwiftudp” forrást használsz) – a <text:span text:style-name="Code">zwift_api</text:span> szekcióban add meg a Zwift e-mail-címedet és jelszavadat. <text:span text:style-name="Bold">Figyelem:</text:span> a jelszó titkosítatlanul tárolódik a fájlban! Ha ezt el akarod kerülni, add meg inkább a <text:span text:style-name="Code">ZWIFT_USERNAME</text:span> és <text:span text:style-name="Code">ZWIFT_PASSWORD</text:span> környezeti változókban.</text:p>
        </text:list-item>
        <text:list-item>
          <text:p text:style-name="Text_20_body"><text:span text:style-name="Bold">Pulzus-beállítások</text:span> (ha pulzust is használsz) – a <text:span text:style-name="Code">heart_rate_zones</text:span> szekcióban a <text:span text:style-name="Code">max_hr</text:span> (maximális pulzus) és <text:span text:style-name="Code">resting_hr</text:span> (nyugalmi pulzus) értékeit írd át a sajátodra.</text:p>
        </text:list-item>
      </text:list>
      <text:p text:style-name="Text_20_body">Elgépeléstől nem kell félni: a program minden hibás értéket ⚠ jelzéssel kiír, és az alapértelmezettel megy tovább. Ha véletlenül elrontod a fájl JSON-szerkezetét (pl. lemarad egy vessző), a program a hibás fájlt <text:span text:style-name="Code">settings.json.incorrect</text:span> néven félreteszi, a naplóban megadja a hiba pontos sorát/oszlopát – javítsd ki, nevezd vissza, és indítsd újra.</text:p>
      <text:h text:style-name="Heading_20_2" text:outline-level="2">5. Zónamódok – melyiket válaszd?</text:h>
      <text:p text:style-name="Text_20_body">A <text:span text:style-name="Code">heart_rate_zones.zone_mode</text:span> mező dönti el, mi vezérli a ventilátort: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Mód</text:p>
          </table:table-cell>
          <table:table-cell table:style-name="TabHead" office:value-type="string">
            <text:p text:style-name="Table_20_Heading">Mit jelent?</text:p>
          </table:table-cell>
          <table:table-cell table:style-name="TabHead" office:value-type="string">
            <text:p text:style-name="Table_20_Heading">Mikor jó?</text:p>
          </table:table-cell>
        </table:table-row>
        <table:table-row>
          <table:table-cell table:style-name="TabCell" office:value-type="string">
            <text:p text:style-name="Table_20_Contents"><text:span text:style-name="Code">power_only</text:span></text:p>
          </table:table-cell>
          <table:table-cell table:style-name="TabCell" office:value-type="string">
            <text:p text:style-name="Table_20_Contents">Csak a watt számít.</text:p>
          </table:table-cell>
          <table:table-cell table:style-name="TabCell" office:value-type="string">
            <text:p text:style-name="Table_20_Contents">Rövid, intenzív edzések; azonnal reagál a terhelésre.</text:p>
          </table:table-cell>
        </table:table-row>
        <table:table-row>
          <table:table-cell table:style-name="TabCell" office:value-type="string">
            <text:p text:style-name="Table_20_Contents"><text:span text:style-name="Code">hr_only</text:span></text:p>
          </table:table-cell>
          <table:table-cell table:style-name="TabCell" office:value-type="string">
            <text:p text:style-name="Table_20_Contents">Csak a pulzus számít.</text:p>
          </table:table-cell>
          <table:table-cell table:style-name="TabCell" office:value-type="string">
            <text:p text:style-name="Table_20_Contents">Ha nincs wattmérőd, vagy a hűtést a tényleges igénybevételhez akarod igazítani.</text:p>
          </table:table-cell>
        </table:table-row>
        <table:table-row>
          <table:table-cell table:style-name="TabCell" office:value-type="string">
            <text:p text:style-name="Table_20_Contents"><text:span text:style-name="Code">higher_wins</text:span></text:p>
          </table:table-cell>
          <table:table-cell table:style-name="TabCell" office:value-type="string">
            <text:p text:style-name="Table_20_Contents">A kettő közül a magasabb zóna nyer. <text:span text:style-name="Bold">(alapértelmezett)</text:span></text:p>
          </table:table-cell>
          <table:table-cell table:style-name="TabCell" office:value-type="string">
            <text:p text:style-name="Table_20_Contents">A legtöbb esetben ez a legkényelmesebb: intervallnál a watt kapcsol gyorsan, hosszú tempónál a felkúszó pulzus is erősíti a hűtést.</text:p>
          </table:table-cell>
        </table:table-row>
      </table:table>
      <text:p text:style-name="Text_20_body">Példa zónahatárok az alapértelmezett százalékokkal (FTP = 200 W, max. pulzus = 185):</text:p>
      <table:table table:style-name="TabWide">
        <table:table-column table:number-columns-repeated="2"/>
        <table:table-row>
          <table:table-cell table:style-name="TabHead" office:value-type="string">
            <text:p text:style-name="Table_20_Heading">Zóna</text:p>
          </table:table-cell>
          <table:table-cell table:style-name="TabHead" office:value-type="string">
            <text:p text:style-name="Table_20_Heading">Ventilátor</text:p>
          </table:table-cell>
          <table:table-cell table:style-name="TabHead" office:value-type="string">
            <text:p text:style-name="Table_20_Heading">Watt (Z1: 60%, Z2: 89%)</text:p>
          </table:table-cell>
          <table:table-cell table:style-name="TabHead" office:value-type="string">
            <text:p text:style-name="Table_20_Heading">Pulzus (Z1: 70%, Z2: 80%)</text:p>
          </table:table-cell>
        </table:table-row>
        <table:table-row>
          <table:table-cell table:style-name="TabCell" office:value-type="string">
            <text:p text:style-name="Table_20_Contents">Z0</text:p>
          </table:table-cell>
          <table:table-cell table:style-name="TabCell" office:value-type="string">
            <text:p text:style-name="Table_20_Contents">Ki</text:p>
          </table:table-cell>
          <table:table-cell table:style-name="TabCell" office:value-type="string">
            <text:p text:style-name="Table_20_Contents">0 W</text:p>
          </table:table-cell>
          <table:table-cell table:style-name="TabCell" office:value-type="string">
            <text:p text:style-name="Table_20_Contents">60 bpm alatt (nyugalmi alatt)</text:p>
          </table:table-cell>
        </table:table-row>
        <table:table-row>
          <table:table-cell table:style-name="TabCell" office:value-type="string">
            <text:p text:style-name="Table_20_Contents">Z1</text:p>
          </table:table-cell>
          <table:table-cell table:style-name="TabCell" office:value-type="string">
            <text:p text:style-name="Table_20_Contents">Gyenge</text:p>
          </table:table-cell>
          <table:table-cell table:style-name="TabCell" office:value-type="string">
            <text:p text:style-name="Table_20_Contents">1–120 W</text:p>
          </table:table-cell>
          <table:table-cell table:style-name="TabCell" office:value-type="string">
            <text:p text:style-name="Table_20_Contents">60–129 bpm</text:p>
          </table:table-cell>
        </table:table-row>
        <table:table-row>
          <table:table-cell table:style-name="TabCell" office:value-type="string">
            <text:p text:style-name="Table_20_Contents">Z2</text:p>
          </table:table-cell>
          <table:table-cell table:style-name="TabCell" office:value-type="string">
            <text:p text:style-name="Table_20_Contents">Közepes</text:p>
          </table:table-cell>
          <table:table-cell table:style-name="TabCell" office:value-type="string">
            <text:p text:style-name="Table_20_Contents">121–178 W</text:p>
          </table:table-cell>
          <table:table-cell table:style-name="TabCell" office:value-type="string">
            <text:p text:style-name="Table_20_Contents">130–148 bpm</text:p>
          </table:table-cell>
        </table:table-row>
        <table:table-row>
          <table:table-cell table:style-name="TabCell" office:value-type="string">
            <text:p text:style-name="Table_20_Contents">Z3</text:p>
          </table:table-cell>
          <table:table-cell table:style-name="TabCell" office:value-type="string">
            <text:p text:style-name="Table_20_Contents">Maximum</text:p>
          </table:table-cell>
          <table:table-cell table:style-name="TabCell" office:value-type="string">
            <text:p text:style-name="Table_20_Contents">179 W felett</text:p>
          </table:table-cell>
          <table:table-cell table:style-name="TabCell" office:value-type="string">
            <text:p text:style-name="Table_20_Contents">149 bpm felett</text:p>
          </table:table-cell>
        </table:table-row>
      </table:table>
      <text:h text:style-name="Heading_20_2" text:outline-level="2">6. Tipikus összeállítások</text:h>
      <text:p text:style-name="Text_20_body"><text:span text:style-name="Bold">a) ANT+ wattmérő + ANT+ pulzus:</text:span> <text:span text:style-name="Code">power_source: "antplus"</text:span>, <text:span text:style-name="Code">hr_source: "antplus"</text:span>. Dugd be az ANT+ sticket indítás előtt. Első futásnál hagyd az eszköz-azonosítókat 0-n (a program az első megtalált eszközt használja), majd az <text:span text:style-name="Code">ant_devices.log</text:span>-ból kiolvashatod a pontos azonosítókat, ha rögzíteni akarod őket.</text:p>
      <text:p text:style-name="Text_20_body"><text:span text:style-name="Bold">b) BLE wattmérő + BLE pulzus:</text:span> <text:span text:style-name="Code">power_source: "ble"</text:span>, <text:span text:style-name="Code">hr_source: "ble"</text:span>. Eszköznevek nélkül a program automatikusan megtalálja a szenzorokat a szabványos Bluetooth-szolgáltatásaik alapján. Fontos: a szenzor egyszerre csak egy helyre tud kapcsolódni – ha a Zwift már „elvette”, a program nem éri el (és fordítva)!</text:p>
      <text:p text:style-name="Text_20_body"><text:span text:style-name="Bold">c) Zwift, mint forrás (a legegyszerűbb, ha Zwiftezel):</text:span> <text:span text:style-name="Code">power_source: "zwiftudp"</text:span>, <text:span text:style-name="Code">hr_source: "zwiftudp"</text:span>. Ilyenkor a szenzorok a Zwifthez kapcsolódnak, a program pedig a Zwift szerverétől kapja az adatokat – nem kell osztozni a szenzorokon. Cserébe az adat pár másodperces késéssel érkezik (ezt a program nagyobb átlagoló-ablakkal kezeli), és internetkapcsolat kell hozzá.</text:p>
      <text:p text:style-name="Text_20_body"><text:span text:style-name="Bold">d) Vegyes:</text:span> pl. <text:span text:style-name="Code">power_source: "zwiftudp"</text:span> + <text:span text:style-name="Code">hr_source: "ble"</text:span> – watt a Zwiftből, pulzus közvetlenül a mellkaspántról. Bármelyik kombináció működik.</text:p>
      <text:p text:style-name="Text_20_body"><text:span text:style-name="Bold">e) Csak pulzus (nincs wattmérő):</text:span> <text:span text:style-name="Code">power_source: null</text:span>, <text:span text:style-name="Code">hr_source: "ble"</text:span> (vagy antplus), és <text:span text:style-name="Code">zone_mode: "hr_only"</text:span>.</text:p>
      <text:h text:style-name="Heading_20_2" text:outline-level="2">7. A program indítása és egy edzés menete</text:h>
      <text:list text:style-name="LNumber">
        <text:list-item>
          <text:p text:style-name="Text_20_body">Kapcsold be a ventilátor-vezérlő dobozt és a szenzorokat.</text:p>
        </text:list-item>
        <text:list-item>
          <text:p text:style-name="Text_20_body">Indítsd el a programot (<text:span text:style-name="Code">run.bat</text:span> / <text:span text:style-name="Code">python zwift_fan_controller.py</text:span>).</text:p>
        </text:list-item>
        <text:list-item>
          <text:p text:style-name="Text_20_body">A konzolon megjelenik az indulási összefoglaló (FTP, zónahatárok, források) – érdemes egy pillantást vetni rá, hogy minden az-e, amit vártál.</text:p>
        </text:list-item>
        <text:list-item>
          <text:p text:style-name="Text_20_body">Ha a Zwift-forrás aktív és a <text:span text:style-name="Code">zwift_auto_launch</text:span> be van kapcsolva, a program magától elindítja a Zwiftet, és megnyomja helyetted a „LET'S GO” gombot.</text:p>
        </text:list-item>
        <text:list-item>
          <text:p text:style-name="Text_20_body">Megjelenik a HUD, felhangzik az indító hang. A program csatlakozik a ventilátorhoz (a HUD-on a BLE FAN sor ONLINE-ra vált), és várja az adatokat.</text:p>
        </text:list-item>
        <text:list-item>
          <text:p text:style-name="Text_20_body">Tekerni kezdesz – pár másodperc múlva (amint összegyűlt elég adat az átlagoláshoz) a ventilátor magától a megfelelő fokozatra kapcsol. Innentől minden automatikus.</text:p>
        </text:list-item>
        <text:list-item>
          <text:p text:style-name="Text_20_body">Az edzés végén lépj ki a Zwiftből (a program magától leáll), vagy zárd be a HUD-ot / nyomj Ctrl+C-t. A ventilátor leállításáról a program minden esetben gondoskodik.</text:p>
        </text:list-item>
      </text:list>
      <text:p text:style-name="Text_20_body"><text:span text:style-name="Bold">Jó tudni a zónaváltásokról:</text:span> emelkedésnél a ventilátor azonnal vált. Csökkenésnél viszont szándékosan vár (alapból 2 percet, ez a „cooldown”), hogy egy rövid lazításnál ne kapcsolgasson feleslegesen. Nagy visszaesésnél (2+ zóna vagy megállás) a várakozás felére rövidül. Ha azt szeretnéd, hogy megálláskor (0 watt) a ventilátor <text:span text:style-name="Bold">azonnal</text:span> leálljon, kapcsold be a <text:span text:style-name="Code">zero_power_immediate</text:span> beállítást.</text:p>
      <text:h text:style-name="Heading_20_2" text:outline-level="2">8. A HUD használata</text:h>
      <text:p text:style-name="Text_20_body">A HUD egy kis méretű, mindig legfelül lebegő, félig átlátszó ablak. Elemei fentről lefelé:</text:p>
      <text:list text:style-name="LBullet">
        <text:list-item>
          <text:p text:style-name="Text_20_body"><text:span text:style-name="Bold">FAN ZONE</text:span> – az aktuális fokozat (STANDBY / ZONE 1 / ZONE 2 / ZONE 3), alatta zónasáv.</text:p>
        </text:list-item>
        <text:list-item>
          <text:p text:style-name="Text_20_body"><text:span text:style-name="Bold">Állapotcsempék</text:span> – a bekapcsolt funkciók villognak: ZPO IMM (0 W azonnali leállás), ZHR IMM, HI WINS (higher_wins mód), ANT+, BLE, COOL (cooldown fut éppen).</text:p>
        </text:list-item>
        <text:list-item>
          <text:p text:style-name="Text_20_body"><text:span text:style-name="Bold">POWER / HEART RATE</text:span> – az átlagolt watt és pulzus, alattuk mérősáv (a watt az FTP-hez, a pulzus a nyugalmi–max tartományhoz viszonyítva, zónaszínnel).</text:p>
        </text:list-item>
        <text:list-item>
          <text:p text:style-name="Text_20_body"><text:span text:style-name="Bold">BLE FAN</text:span> – a ventilátor-kapcsolat: ONLINE (rendben), villogó piros OFFLINE (nincs kapcsolat, a program folyamatosan újrapróbálkozik), villogó sárga PIN FAIL (rossz PIN a settings.json-ban!), DISABLED (BLE nem elérhető).</text:p>
        </text:list-item>
        <text:list-item>
          <text:p text:style-name="Text_20_body"><text:span text:style-name="Bold">BLE SEN. / ANT+ SEN. / ZWIFT</text:span> – a források állapota <text:span text:style-name="Code">P:OK  HR:OK</text:span> formában: OK = él az adat, FAIL (villogó piros) = a kiválasztott forrásból nem jön adat, „--” = az adott adat nincs ebből a forrásból használva.</text:p>
        </text:list-item>
        <text:list-item>
          <text:p text:style-name="Text_20_body"><text:span text:style-name="Bold">LAST TX</text:span> – hány másodperce ment ki az utolsó parancs a ventilátornak. <text:span text:style-name="Bold">COOLDOWN</text:span> – a hátralévő várakozási idő zónacsökkentésnél.</text:p>
        </text:list-item>
        <text:list-item>
          <text:p text:style-name="Text_20_body"><text:span text:style-name="Bold">OPACITY</text:span> – átlátszóság-csúszka (20–100%).</text:p>
        </text:list-item>
      </text:list>
      <text:p text:style-name="Text_20_body"><text:span text:style-name="Bold">Kezelés:</text:span></text:p>
      <text:list text:style-name="LBullet">
        <text:list-item>
          <text:p text:style-name="Text_20_body"><text:span text:style-name="Bold">Mozgatás:</text:span> fogd meg bárhol az ablakot és húzd.</text:p>
        </text:list-item>
        <text:list-item>
          <text:p text:style-name="Text_20_body"><text:span text:style-name="Bold">Átméretezés:</text:span> a jobb alsó saroknál fogva – a teljes tartalom arányosan nő/csökken.</text:p>
        </text:list-item>
        <text:list-item>
          <text:p text:style-name="Text_20_body"><text:span text:style-name="Bold">Jobb egérgomb:</text:span> menü – bezárás, átlátszóság-gyorsválasztó (50/85/100%), hangok ki/be, hangerő (25–100%).</text:p>
        </text:list-item>
        <text:list-item>
          <text:p text:style-name="Text_20_body"><text:span text:style-name="Bold">Esc:</text:span> bezárja a HUD-ot (és vele a programot).</text:p>
        </text:list-item>
      </text:list>
      <text:p text:style-name="Text_20_body"><text:span text:style-name="Bold">Pozíció megjegyzése:</text:span> ha a <text:span text:style-name="Code">hud.save_hud_settings</text:span> beállítást <text:span text:style-name="Code">true</text:span>-ra állítod, a program monitoronként megjegyzi az ablak helyét, méretét, az átlátszóságot és a hangerőt, és következő induláskor visszaállítja. Alapértelmezetten ez ki van kapcsolva, hogy a HUD-on állítgatás sose írja felül a kézzel szerkesztett settings.json-t.</text:p>
      <text:p text:style-name="Text_20_body"><text:span text:style-name="Bold">Hangok:</text:span> minden fontos eseménynek saját hangjelzése van (zónaváltás, szenzor-kiesés és -visszatérés, Zwift-kapcsolat, parancsküldés, indítás/leállás). A hangok a <text:span text:style-name="Code">sounds/</text:span> mappában lévő WAV fájlok – ha másikat szeretnél, egyszerűen cseréld le a fájlokat (azonos névvel).</text:p>
      <text:h text:style-name="Heading_20_2" text:outline-level="2">9. Leállítás</text:h>
      <text:p text:style-name="Text_20_body">Három egyenrangú módon állíthatod le a programot – mindegyik ugyanazt a rendezett leállást indítja:</text:p>
      <text:list text:style-name="LBullet">
        <text:list-item>
          <text:p text:style-name="Text_20_body">a HUD bezárásával (X, Esc vagy jobb klikk → Bezárás),</text:p>
        </text:list-item>
        <text:list-item>
          <text:p text:style-name="Text_20_body">Ctrl+C-vel a konzolban,</text:p>
        </text:list-item>
        <text:list-item>
          <text:p text:style-name="Text_20_body">a Zwiftből kilépve (ha a <text:span text:style-name="Code">close_at_zwiftapp.exe</text:span> beállítás aktív – alapból az).</text:p>
        </text:list-item>
      </text:list>
      <text:p text:style-name="Text_20_body">A program minden esetben leállítja a ventilátort (LEVEL:0), lekapcsolja a görgő-funkciót (ROLLER:0), bontja a Bluetooth-kapcsolatokat, és leállítja a Zwift-lekérdező segédprogramot. Áramtalanítás előtt nem kell semmi mást tenned.</text:p>
      <text:h text:style-name="Heading_20_2" text:outline-level="2">10. Hibaelhárítás</text:h>
      <table:table table:style-name="TabWide">
        <table:table-column table:number-columns-repeated="2"/>
        <table:table-row>
          <table:table-cell table:style-name="TabHead" office:value-type="string">
            <text:p text:style-name="Table_20_Heading">Tünet</text:p>
          </table:table-cell>
          <table:table-cell table:style-name="TabHead" office:value-type="string">
            <text:p text:style-name="Table_20_Heading">Ok és megoldás</text:p>
          </table:table-cell>
        </table:table-row>
        <table:table-row>
          <table:table-cell table:style-name="TabCell" office:value-type="string">
            <text:p text:style-name="Table_20_Contents">ANT+: „No backend available” vagy libusb-hiba</text:p>
          </table:table-cell>
          <table:table-cell table:style-name="TabCell" office:value-type="string">
            <text:p text:style-name="Table_20_Contents">Hiányzik az ANT+ stick meghajtója. Windows 11-en telepíts <text:span text:style-name="Bold">WinUSB</text:span> meghajtót a stickre a <text:span text:style-name="Bold">Zadig</text:span> eszközzel (zadig.akeo.ie), majd húzd ki és dugd vissza. A program célzott figyelmeztetést is ír erről.</text:p>
          </table:table-cell>
        </table:table-row>
        <table:table-row>
          <table:table-cell table:style-name="TabCell" office:value-type="string">
            <text:p text:style-name="Table_20_Contents">A HUD-on villogó <text:span text:style-name="Bold">PIN FAIL</text:span></text:p>
          </table:table-cell>
          <table:table-cell table:style-name="TabCell" office:value-type="string">
            <text:p text:style-name="Table_20_Contents">A <text:span text:style-name="Code">ble_fan.pin_code</text:span> nem egyezik a firmware-be égetett PIN-nel. Javítsd a settings.json-ban, és indítsd újra a programot.</text:p>
          </table:table-cell>
        </table:table-row>
        <table:table-row>
          <table:table-cell table:style-name="TabCell" office:value-type="string">
            <text:p text:style-name="Table_20_Contents">A HUD-on tartósan <text:span text:style-name="Bold">OFFLINE</text:span> a BLE FAN</text:p>
          </table:table-cell>
          <table:table-cell table:style-name="TabCell" office:value-type="string">
            <text:p text:style-name="Table_20_Contents">A vezérlő doboz nincs bekapcsolva, hatótávon kívül van, vagy deep sleep-be merült (30 perc tétlenség után) – ébreszd fel. A program magától újrapróbálkozik, nem kell újraindítani.</text:p>
          </table:table-cell>
        </table:table-row>
        <table:table-row>
          <table:table-cell table:style-name="TabCell" office:value-type="string">
            <text:p text:style-name="Table_20_Contents">Minden beállítás váratlanul alapértelmezett</text:p>
          </table:table-cell>
          <table:table-cell table:style-name="TabCell" office:value-type="string">
            <text:p text:style-name="Table_20_Contents">A settings.json szerkezete (JSON-szintaxis) hibás. A program a fájlt <text:span text:style-name="Code">settings.json.incorrect</text:span> néven félretette – a naplóban megtalálod a hiba sorát/oszlopát; javítsd, nevezd vissza.</text:p>
          </table:table-cell>
        </table:table-row>
        <table:table-row>
          <table:table-cell table:style-name="TabCell" office:value-type="string">
            <text:p text:style-name="Table_20_Contents">Egy beállításod „nem érvényesül”</text:p>
          </table:table-cell>
          <table:table-cell table:style-name="TabCell" office:value-type="string">
            <text:p text:style-name="Table_20_Contents">Elgépelt szekció- vagy mezőnév, vagy tartományon kívüli érték. Keresd a ⚠ jeleket a naplóban / konzolon – a program pontosan megnevezi a hibás mezőt.</text:p>
          </table:table-cell>
        </table:table-row>
        <table:table-row>
          <table:table-cell table:style-name="TabCell" office:value-type="string">
            <text:p text:style-name="Table_20_Contents">Zwift-bejelentkezési hiba a lekérdező ablakban</text:p>
          </table:table-cell>
          <table:table-cell table:style-name="TabCell" office:value-type="string">
            <text:p text:style-name="Table_20_Contents">A hibaüzenet megadja az okot (pl. „Invalid user credentials” = rossz jelszó). Ellenőrizd a <text:span text:style-name="Code">zwift_api</text:span> szekciót vagy a ZWIFT_USERNAME/ZWIFT_PASSWORD környezeti változókat.</text:p>
          </table:table-cell>
        </table:table-row>
        <table:table-row>
          <table:table-cell table:style-name="TabCell" office:value-type="string">
            <text:p text:style-name="Table_20_Contents">A ZWIFT sor FAIL-t mutat, pedig a Zwift fut</text:p>
          </table:table-cell>
          <table:table-cell table:style-name="TabCell" office:value-type="string">
            <text:p text:style-name="Table_20_Contents">Az adat csak akkor indul el, ha ténylegesen tekersz egy világban (a szerver csak aktív menet közben ad állapotot). Várj, amíg elindul a menet; a lekérdező ablakában látod a beérkező adatokat.</text:p>
          </table:table-cell>
        </table:table-row>
        <table:table-row>
          <table:table-cell table:style-name="TabCell" office:value-type="string">
            <text:p text:style-name="Table_20_Contents">BLE szenzor FAIL, pedig be van kapcsolva</text:p>
          </table:table-cell>
          <table:table-cell table:style-name="TabCell" office:value-type="string">
            <text:p text:style-name="Table_20_Contents">Valószínűleg egy másik program (pl. a Zwift) már lefoglalta – egy BLE szenzor egyszerre csak egy helyre kapcsolódhat. Vagy add a szenzort a programnak és a Zwiftnek az ANT+ /Zwift-forráson keresztül, vagy zárd be a másik alkalmazást.</text:p>
          </table:table-cell>
        </table:table-row>
        <table:table-row>
          <table:table-cell table:style-name="TabCell" office:value-type="string">
            <text:p text:style-name="Table_20_Contents">BLE eszköz lassan csatlakozik</text:p>
          </table:table-cell>
          <table:table-cell table:style-name="TabCell" office:value-type="string">
            <text:p text:style-name="Table_20_Contents">Név alapú keresésnél a program azonnal kapcsolódik, amint az eszköz hirdet – ha mégis lassú, az eszköz nincs hatótávon belül vagy nem hirdet.</text:p>
          </table:table-cell>
        </table:table-row>
        <table:table-row>
          <table:table-cell table:style-name="TabCell" office:value-type="string">
            <text:p text:style-name="Table_20_Contents">Nincs hang</text:p>
          </table:table-cell>
          <table:table-cell table:style-name="TabCell" office:value-type="string">
            <text:p text:style-name="Table_20_Contents">Jobb klikk a HUD-on → „Hang: BE”, és ellenőrizd a hangerőt. Ha a naplóban „hangfájl hiányzik” üzenet van, a <text:span text:style-name="Code">sounds/</text:span> mappából hiányzik WAV – újragenerálható: <text:span text:style-name="Code">python tools/generate_lcars_sounds.py</text:span>.</text:p>
          </table:table-cell>
        </table:table-row>
        <table:table-row>
          <table:table-cell table:style-name="TabCell" office:value-type="string">
            <text:p text:style-name="Table_20_Contents">Nem jelenik meg a HUD</text:p>
          </table:table-cell>
          <table:table-cell table:style-name="TabCell" office:value-type="string">
            <text:p text:style-name="Table_20_Contents">Nincs telepítve a PySide6 (<text:span text:style-name="Code">pip install PySide6</text:span>). A program ilyenkor is teljes értékűen működik, csak a konzolban fut.</text:p>
          </table:table-cell>
        </table:table-row>
        <table:table-row>
          <table:table-cell table:style-name="TabCell" office:value-type="string">
            <text:p text:style-name="Table_20_Contents">Melyik eszközt találta meg a program?</text:p>
          </table:table-cell>
          <table:table-cell table:style-name="TabCell" office:value-type="string">
            <text:p text:style-name="Table_20_Contents">Nézd meg a <text:span text:style-name="Code">ble_devices.log</text:span> / <text:span text:style-name="Code">ant_devices.log</text:span> fájlokat – minden valaha látott eszköz neve/címe/azonosítója benne van. Innen tudod kimásolni a pontos eszköznevet vagy device ID-t a settings.json-hoz.</text:p>
          </table:table-cell>
        </table:table-row>
      </table:table>
      <text:h text:style-name="Heading_20_2" text:outline-level="2">11. Gyakori kérdések</text:h>
      <text:p text:style-name="Text_20_body"><text:span text:style-name="Bold">Használható Zwift nélkül?</text:span> Igen. ANT+ vagy BLE forrással a program teljesen önállóan működik, bármilyen edzőprogram mellett vagy akár anélkül. A Zwift-höz kötődő funkciók (auto-indítás, kilépés-figyelés, zwiftudp forrás) egyszerűen kikapcsolhatók.</text:p>
      <text:p text:style-name="Text_20_body"><text:span text:style-name="Bold">Mennyire terheli a gépet?</text:span> Alig – a program eseményvezérelt, a HUD fél másodpercenként frissül, az adatfeldolgozás pedig mintánként csak néhány műveletet végez. Játék (Zwift) mellett észrevétlenül fut.</text:p>
      <text:p text:style-name="Text_20_body"><text:span text:style-name="Bold">Biztonságban van a Zwift-jelszavam?</text:span> A settings.json-ban titkosítatlanul tárolódik – a fájlt ennek megfelelően kezeld (ne oszd meg, ne tedd verziókövetésbe). Biztonságosabb alternatíva a ZWIFT_USERNAME / ZWIFT_PASSWORD környezeti változó használata.</text:p>
      <text:p text:style-name="Text_20_body"><text:span text:style-name="Bold">Miért nem kapcsol le azonnal a ventilátor, amikor lazítok?</text:span> Ez a cooldown: szándékos védelem a fel-le kapcsolgatás ellen. Ha zavar, csökkentsd a <text:span text:style-name="Code">cooldown_seconds</text:span> értékét (0 = azonnali váltás), és/vagy kapcsold be a <text:span text:style-name="Code">zero_power_immediate</text:span>-et a megálláskori azonnali leálláshoz.</text:p>
      <text:p text:style-name="Text_20_body"><text:span text:style-name="Bold">Átnevezhetem / áthelyezhetem a naplófájlokat?</text:span> A <text:span text:style-name="Code">global_settings.log_directory</text:span> beállítással más mappába irányíthatod őket; a <text:span text:style-name="Code">logging: false</text:span> teljesen kikapcsolja a naplózást (ekkor egyetlen fájl sem jön létre).</text:p>
      <text:p text:style-name="Text_20_body"><text:span text:style-name="Bold">Frissítettem a beállításokat – kell újraindítani?</text:span> Igen: a program a settings.json-t induláskor olvassa be, menet közben nem figyeli. Mentés után indítsd újra.</text:p>
      <text:h text:style-name="Heading_20_2" text:outline-level="2">12. Fájlok gyors áttekintése</text:h>
      <table:table table:style-name="TabWide">
        <table:table-column table:number-columns-repeated="2"/>
        <table:table-row>
          <table:table-cell table:style-name="TabHead" office:value-type="string">
            <text:p text:style-name="Table_20_Heading">Fájl</text:p>
          </table:table-cell>
          <table:table-cell table:style-name="TabHead" office:value-type="string">
            <text:p text:style-name="Table_20_Heading">Mi ez?</text:p>
          </table:table-cell>
        </table:table-row>
        <table:table-row>
          <table:table-cell table:style-name="TabCell" office:value-type="string">
            <text:p text:style-name="Table_20_Contents"><text:span text:style-name="Code">run.bat</text:span> / <text:span text:style-name="Code">zwift_fan_controller.py</text:span></text:p>
          </table:table-cell>
          <table:table-cell table:style-name="TabCell" office:value-type="string">
            <text:p text:style-name="Table_20_Contents">A program indítása.</text:p>
          </table:table-cell>
        </table:table-row>
        <table:table-row>
          <table:table-cell table:style-name="TabCell" office:value-type="string">
            <text:p text:style-name="Table_20_Contents"><text:span text:style-name="Code">setup_windows.bat</text:span></text:p>
          </table:table-cell>
          <table:table-cell table:style-name="TabCell" office:value-type="string">
            <text:p text:style-name="Table_20_Contents">Egyszeri telepítés Windowson (venv + függőségek).</text:p>
          </table:table-cell>
        </table:table-row>
        <table:table-row>
          <table:table-cell table:style-name="TabCell" office:value-type="string">
            <text:p text:style-name="Table_20_Contents"><text:span text:style-name="Code">build_exe.bat</text:span></text:p>
          </table:table-cell>
          <table:table-cell table:style-name="TabCell" office:value-type="string">
            <text:p text:style-name="Table_20_Contents">Önálló exe készítése (PyInstaller).</text:p>
          </table:table-cell>
        </table:table-row>
        <table:table-row>
          <table:table-cell table:style-name="TabCell" office:value-type="string">
            <text:p text:style-name="Table_20_Contents"><text:span text:style-name="Code">settings.json</text:span></text:p>
          </table:table-cell>
          <table:table-cell table:style-name="TabCell" office:value-type="string">
            <text:p text:style-name="Table_20_Contents">A te beállításaid – ezt szerkeszted.</text:p>
          </table:table-cell>
        </table:table-row>
        <table:table-row>
          <table:table-cell table:style-name="TabCell" office:value-type="string">
            <text:p text:style-name="Table_20_Contents"><text:span text:style-name="Code">settings.example.jsonc</text:span></text:p>
          </table:table-cell>
          <table:table-cell table:style-name="TabCell" office:value-type="string">
            <text:p text:style-name="Table_20_Contents">Kommentezett beállítás-referencia (minden mező magyarázattal).</text:p>
          </table:table-cell>
        </table:table-row>
        <table:table-row>
          <table:table-cell table:style-name="TabCell" office:value-type="string">
            <text:p text:style-name="Table_20_Contents"><text:span text:style-name="Code">CONFIGURATION.md</text:span></text:p>
          </table:table-cell>
          <table:table-cell table:style-name="TabCell" office:value-type="string">
            <text:p text:style-name="Table_20_Contents">A beállítások teljes, mezőnkénti dokumentációja.</text:p>
          </table:table-cell>
        </table:table-row>
        <table:table-row>
          <table:table-cell table:style-name="TabCell" office:value-type="string">
            <text:p text:style-name="Table_20_Contents"><text:span text:style-name="Code">mukodes.odt</text:span></text:p>
          </table:table-cell>
          <table:table-cell table:style-name="TabCell" office:value-type="string">
            <text:p text:style-name="Table_20_Contents">Részletes leírás a program belső működéséről.</text:p>
          </table:table-cell>
        </table:table-row>
        <table:table-row>
          <table:table-cell table:style-name="TabCell" office:value-type="string">
            <text:p text:style-name="Table_20_Contents"><text:span text:style-name="Code">smart_fan_controller.log</text:span></text:p>
          </table:table-cell>
          <table:table-cell table:style-name="TabCell" office:value-type="string">
            <text:p text:style-name="Table_20_Contents">A program naplója (hibakereséshez ezt nézd először).</text:p>
          </table:table-cell>
        </table:table-row>
        <table:table-row>
          <table:table-cell table:style-name="TabCell" office:value-type="string">
            <text:p text:style-name="Table_20_Contents"><text:span text:style-name="Code">ble_devices.log</text:span> / <text:span text:style-name="Code">ant_devices.log</text:span></text:p>
          </table:table-cell>
          <table:table-cell table:style-name="TabCell" office:value-type="string">
            <text:p text:style-name="Table_20_Contents">A valaha megtalált Bluetooth / ANT+ eszközök listája.</text:p>
          </table:table-cell>
        </table:table-row>
        <table:table-row>
          <table:table-cell table:style-name="TabCell" office:value-type="string">
            <text:p text:style-name="Table_20_Contents"><text:span text:style-name="Code">zwift_api_polling.log</text:span></text:p>
          </table:table-cell>
          <table:table-cell table:style-name="TabCell" office:value-type="string">
            <text:p text:style-name="Table_20_Contents">A Zwift-lekérdező segédprogram naplója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office:version="1.2">
  <office:font-face-decls>
    <style:font-face style:name="Liberation Serif" svg:font-family="'Liberation Serif', 'Times New Roman', serif"/>
    <style:font-face style:name="Liberation Sans" svg:font-family="'Liberation Sans', Arial, sans-serif"/>
    <style:font-face style:name="Liberation Mono" svg:font-family="'Liberation Mono', 'Courier New', monospace"/>
  </office:font-face-decls>
  <office:styles>
    <style:default-style style:family="paragraph">
      <style:paragraph-properties fo:hyphenation-ladder-count="no-limit"/>
      <style:text-properties style:font-name="Liberation Serif" fo:font-size="11pt" fo:language="hu" fo:country="HU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5cm" fo:line-height="115%"/>
    </style:style>
    <style:style style:name="Title" style:family="paragraph" style:parent-style-name="Standard" style:class="chapter">
      <style:paragraph-properties fo:margin-top="0cm" fo:margin-bottom="0.4cm"/>
      <style:text-properties style:font-name="Liberation Sans" fo:font-size="20pt" fo:font-weight="bold" fo:color="#1a3d6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5cm" fo:margin-bottom="0.2cm" fo:keep-with-next="always"/>
      <style:text-properties style:font-name="Liberation Sans" fo:font-size="14pt" fo:font-weight="bold" fo:color="#1a3d6d"/>
    </style:style>
    <style:style style:name="Table_20_Contents" style:display-name="Table Contents" style:family="paragraph" style:parent-style-name="Standard" style:class="extra">
      <style:paragraph-properties fo:margin-top="0.05cm" fo:margin-bottom="0.05cm"/>
      <style:text-properties fo:font-size="10pt"/>
    </style:style>
    <style:style style:name="Table_20_Heading" style:display-name="Table Heading" style:family="paragraph" style:parent-style-name="Table_20_Contents" style:class="extra">
      <style:text-properties fo:font-weight="bold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Code" style:family="text">
      <style:text-properties style:font-name="Liberation Mono" fo:font-size="10pt" fo:background-color="#f0f0f0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Smart Fan Controller – működési leírás</dc:title>
    <meta:generator>smart_fan_controller docs generator</meta:generator>
  </office:meta>
</office:document-meta>
</file>